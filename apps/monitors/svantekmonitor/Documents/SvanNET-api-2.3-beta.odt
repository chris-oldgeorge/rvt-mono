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language="sv" fo:country="SE"/>
    </style:style>
    <style:style style:name="P2" style:parent-style-name="Standard" style:family="paragraph">
      <style:paragraph-properties fo:text-align="center"/>
      <style:text-properties fo:font-weight="bold" style:font-weight-asian="bold" style:font-weight-complex="bold" fo:language="sv" fo:country="SE"/>
    </style:style>
    <style:style style:name="P3" style:parent-style-name="Standard" style:family="paragraph">
      <style:paragraph-properties fo:text-align="justify"/>
      <style:text-properties fo:language="sv" fo:country="SE"/>
    </style:style>
    <style:style style:name="P4" style:parent-style-name="Standard" style:family="paragraph">
      <style:paragraph-properties fo:text-align="justify"/>
      <style:text-properties fo:font-weight="bold" style:font-weight-asian="bold" style:font-weight-complex="bold" fo:language="sv" fo:country="SE"/>
    </style:style>
    <style:style style:name="P5" style:parent-style-name="Standard" style:family="paragraph">
      <style:paragraph-properties fo:text-align="justify"/>
      <style:text-properties fo:language="sv" fo:country="SE"/>
    </style:style>
    <style:style style:name="P6" style:parent-style-name="Standard" style:family="paragraph">
      <style:paragraph-properties fo:text-align="justify"/>
    </style:style>
    <style:style style:name="T7" style:parent-style-name="Domyślnaczcionkaakapitu" style:family="text">
      <style:text-properties fo:language="sv" fo:country="SE"/>
    </style:style>
    <style:style style:name="P8" style:parent-style-name="Standard" style:family="paragraph">
      <style:paragraph-properties fo:text-align="justify"/>
      <style:text-properties fo:language="sv" fo:country="SE"/>
    </style:style>
    <style:style style:name="P9" style:parent-style-name="Standard" style:family="paragraph">
      <style:paragraph-properties fo:text-align="justify"/>
      <style:text-properties fo:font-style="italic" style:font-style-asian="italic" style:font-style-complex="italic"/>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fo:text-indent="0.4923in"/>
    </style:style>
    <style:style style:name="P14" style:parent-style-name="Standard" style:list-style-name="LFO2"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fo:text-indent="0.4923in"/>
    </style:style>
    <style:style style:name="P17" style:parent-style-name="Standard" style:list-style-name="LFO2"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list-style-name="LFO3" style:family="paragraph">
      <style:paragraph-properties fo:text-align="justify"/>
    </style:style>
    <style:style style:name="P21" style:parent-style-name="Standard" style:list-style-name="LFO3" style:family="paragraph">
      <style:paragraph-properties fo:text-align="justify"/>
    </style:style>
    <style:style style:name="P22" style:parent-style-name="Standard" style:list-style-name="LFO3" style:family="paragraph">
      <style:paragraph-properties fo:text-align="justify"/>
    </style:style>
    <style:style style:name="P23" style:parent-style-name="Standard" style:list-style-name="LFO3" style:family="paragraph">
      <style:paragraph-properties fo:text-align="justify"/>
    </style:style>
    <style:style style:name="P24" style:parent-style-name="Standard" style:list-style-name="LFO3" style:family="paragraph">
      <style:paragraph-properties fo:text-align="justify"/>
    </style:style>
    <style:style style:name="P25" style:parent-style-name="Standard" style:list-style-name="LFO3" style:family="paragraph">
      <style:paragraph-properties fo:text-align="justify"/>
    </style:style>
    <style:style style:name="P26" style:parent-style-name="Standard" style:list-style-name="LFO3" style:family="paragraph">
      <style:paragraph-properties fo:text-align="justify"/>
    </style:style>
    <style:style style:name="P27" style:parent-style-name="Standard" style:list-style-name="LFO3" style:family="paragraph">
      <style:paragraph-properties fo:text-align="justify"/>
    </style:style>
    <style:style style:name="P28" style:parent-style-name="Standard" style:list-style-name="LFO3" style:family="paragraph">
      <style:paragraph-properties fo:text-align="justify"/>
    </style:style>
    <style:style style:name="P29" style:parent-style-name="Standard" style:list-style-name="LFO3" style:family="paragraph">
      <style:paragraph-properties fo:text-align="justify"/>
    </style:style>
    <style:style style:name="P30" style:parent-style-name="Standard" style:list-style-name="LFO3" style:family="paragraph">
      <style:paragraph-properties fo:text-align="justify"/>
    </style:style>
    <style:style style:name="P31" style:parent-style-name="Standard" style:list-style-name="LFO3" style:family="paragraph">
      <style:paragraph-properties fo:text-align="justify"/>
    </style:style>
    <style:style style:name="P32" style:parent-style-name="Standard" style:list-style-name="LFO3" style:family="paragraph">
      <style:paragraph-properties fo:text-align="justify"/>
    </style:style>
    <style:style style:name="P33" style:parent-style-name="Standard" style:list-style-name="LFO3" style:family="paragraph">
      <style:paragraph-properties fo:text-align="justify"/>
    </style:style>
    <style:style style:name="P34" style:parent-style-name="Standard" style:list-style-name="LFO3" style:family="paragraph">
      <style:paragraph-properties fo:text-align="justify"/>
    </style:style>
    <style:style style:name="P35" style:parent-style-name="Standard" style:list-style-name="LFO3" style:family="paragraph">
      <style:paragraph-properties fo:text-align="justify"/>
    </style:style>
    <style:style style:name="P36" style:parent-style-name="Standard" style:list-style-name="LFO3" style:family="paragraph">
      <style:paragraph-properties fo:text-align="justify"/>
    </style:style>
    <style:style style:name="P37" style:parent-style-name="Standard" style:list-style-name="LFO3" style:family="paragraph">
      <style:paragraph-properties fo:text-align="justify"/>
    </style:style>
    <style:style style:name="P38" style:parent-style-name="Standard" style:list-style-name="LFO3" style:family="paragraph">
      <style:paragraph-properties fo:text-align="justify"/>
    </style:style>
    <style:style style:name="P39" style:parent-style-name="Standard" style:list-style-name="LFO3" style:family="paragraph">
      <style:paragraph-properties fo:text-align="justify"/>
    </style:style>
    <style:style style:name="P40" style:parent-style-name="Standard" style:list-style-name="LFO3" style:family="paragraph">
      <style:paragraph-properties fo:text-align="justify"/>
    </style:style>
    <style:style style:name="P41" style:parent-style-name="Standard" style:list-style-name="LFO3" style:family="paragraph">
      <style:paragraph-properties fo:text-align="justify"/>
    </style:style>
    <style:style style:name="P42" style:parent-style-name="Standard" style:list-style-name="LFO3" style:family="paragraph">
      <style:paragraph-properties fo:text-align="justify"/>
    </style:style>
    <style:style style:name="P43" style:parent-style-name="Standard" style:list-style-name="LFO3" style:family="paragraph">
      <style:paragraph-properties fo:text-align="justify"/>
    </style:style>
    <style:style style:name="P44" style:parent-style-name="Standard" style:list-style-name="LFO3" style:family="paragraph">
      <style:paragraph-properties fo:text-align="justify"/>
    </style:style>
    <style:style style:name="P45" style:parent-style-name="Standard" style:list-style-name="LFO3" style:family="paragraph">
      <style:paragraph-properties fo:text-align="justify"/>
    </style:style>
    <style:style style:name="P46" style:parent-style-name="Standard" style:list-style-name="LFO3" style:family="paragraph">
      <style:paragraph-properties fo:text-align="justify"/>
    </style:style>
    <style:style style:name="P47" style:parent-style-name="Standard" style:list-style-name="LFO3" style:family="paragraph">
      <style:paragraph-properties fo:text-align="justify"/>
    </style:style>
    <style:style style:name="P48" style:parent-style-name="Standard" style:list-style-name="LFO3" style:family="paragraph">
      <style:paragraph-properties fo:text-align="justify"/>
    </style:style>
    <style:style style:name="P49" style:parent-style-name="Standard" style:list-style-name="LFO3" style:family="paragraph">
      <style:paragraph-properties fo:text-align="justify"/>
    </style:style>
    <style:style style:name="P50" style:parent-style-name="Standard" style:list-style-name="LFO3" style:family="paragraph">
      <style:paragraph-properties fo:text-align="justify"/>
    </style:style>
    <style:style style:name="P51" style:parent-style-name="Standard" style:list-style-name="LFO3" style:family="paragraph">
      <style:paragraph-properties fo:text-align="justify"/>
    </style:style>
    <style:style style:name="P52" style:parent-style-name="Standard" style:list-style-name="LFO3" style:family="paragraph">
      <style:paragraph-properties fo:text-align="justify"/>
    </style:style>
    <style:style style:name="P53" style:parent-style-name="Standard" style:list-style-name="LFO3" style:family="paragraph">
      <style:paragraph-properties fo:text-align="justify"/>
    </style:style>
    <style:style style:name="P54" style:parent-style-name="Standard" style:list-style-name="LFO3" style:family="paragraph">
      <style:paragraph-properties fo:text-align="justify"/>
    </style:style>
    <style:style style:name="P55" style:parent-style-name="Standard" style:list-style-name="LFO3" style:family="paragraph">
      <style:paragraph-properties fo:text-align="justify"/>
    </style:style>
    <style:style style:name="P56" style:parent-style-name="Standard" style:list-style-name="LFO3" style:family="paragraph">
      <style:paragraph-properties fo:text-align="justify"/>
    </style:style>
    <style:style style:name="P57" style:parent-style-name="Standard" style:list-style-name="LFO3" style:family="paragraph">
      <style:paragraph-properties fo:text-align="justify"/>
    </style:style>
    <style:style style:name="P58" style:parent-style-name="Standard" style:list-style-name="LFO3" style:family="paragraph">
      <style:paragraph-properties fo:text-align="justify"/>
    </style:style>
    <style:style style:name="P59" style:parent-style-name="Standard" style:list-style-name="LFO3" style:family="paragraph">
      <style:paragraph-properties fo:text-align="justify"/>
    </style:style>
    <style:style style:name="P60" style:parent-style-name="Standard" style:list-style-name="LFO3" style:family="paragraph">
      <style:paragraph-properties fo:text-align="justify"/>
    </style:style>
    <style:style style:name="P61" style:parent-style-name="Standard" style:list-style-name="LFO3" style:family="paragraph">
      <style:paragraph-properties fo:text-align="justify"/>
    </style:style>
    <style:style style:name="P62" style:parent-style-name="Standard" style:family="paragraph">
      <style:paragraph-properties fo:text-align="justify"/>
    </style:style>
    <style:style style:name="P63" style:parent-style-name="Standard" style:list-style-name="LFO4" style:family="paragraph">
      <style:paragraph-properties fo:text-align="justify"/>
    </style:style>
    <style:style style:name="P64" style:parent-style-name="Standard" style:list-style-name="LFO4" style:family="paragraph">
      <style:paragraph-properties fo:text-align="justify"/>
    </style:style>
    <style:style style:name="P65" style:parent-style-name="Standard" style:list-style-name="LFO4" style:family="paragraph">
      <style:paragraph-properties fo:text-align="justify"/>
    </style:style>
    <style:style style:name="P66" style:parent-style-name="Standard" style:list-style-name="LFO4" style:family="paragraph">
      <style:paragraph-properties fo:text-align="justify"/>
    </style:style>
    <style:style style:name="P67" style:parent-style-name="Standard" style:list-style-name="LFO4" style:family="paragraph">
      <style:paragraph-properties fo:text-align="justify"/>
    </style:style>
    <style:style style:name="P68" style:parent-style-name="Standard" style:list-style-name="LFO4" style:family="paragraph">
      <style:paragraph-properties fo:text-align="justify"/>
    </style:style>
    <style:style style:name="P69" style:parent-style-name="Standard" style:list-style-name="LFO4" style:family="paragraph">
      <style:paragraph-properties fo:text-align="justify"/>
    </style:style>
    <style:style style:name="P70" style:parent-style-name="Standard" style:list-style-name="LFO4" style:family="paragraph">
      <style:paragraph-properties fo:text-align="justify"/>
    </style:style>
    <style:style style:name="P71" style:parent-style-name="Standard" style:list-style-name="LFO4" style:family="paragraph">
      <style:paragraph-properties fo:text-align="justify"/>
    </style:style>
    <style:style style:name="P72" style:parent-style-name="Standard" style:list-style-name="LFO4" style:family="paragraph">
      <style:paragraph-properties fo:text-align="justify"/>
    </style:style>
    <style:style style:name="P73" style:parent-style-name="Standard" style:list-style-name="LFO4" style:family="paragraph">
      <style:paragraph-properties fo:text-align="justify"/>
    </style:style>
    <style:style style:name="P74" style:parent-style-name="Standard" style:list-style-name="LFO4" style:family="paragraph">
      <style:paragraph-properties fo:text-align="justify"/>
    </style:style>
    <style:style style:name="P75" style:parent-style-name="Standard" style:list-style-name="LFO4" style:family="paragraph">
      <style:paragraph-properties fo:text-align="justify"/>
    </style:style>
    <style:style style:name="P76" style:parent-style-name="Standard" style:list-style-name="LFO4" style:family="paragraph">
      <style:paragraph-properties fo:text-align="justify"/>
    </style:style>
    <style:style style:name="P77" style:parent-style-name="Standard" style:list-style-name="LFO4" style:family="paragraph">
      <style:paragraph-properties fo:text-align="justify"/>
    </style:style>
    <style:style style:name="P78" style:parent-style-name="Standard" style:list-style-name="LFO4" style:family="paragraph">
      <style:paragraph-properties fo:text-align="justify"/>
    </style:style>
    <style:style style:name="P79" style:parent-style-name="Standard" style:list-style-name="LFO4" style:family="paragraph">
      <style:paragraph-properties fo:text-align="justify"/>
    </style:style>
    <style:style style:name="P80" style:parent-style-name="Standard" style:list-style-name="LFO4" style:family="paragraph">
      <style:paragraph-properties fo:text-align="justify"/>
    </style:style>
    <style:style style:name="P81" style:parent-style-name="Standard" style:list-style-name="LFO4" style:family="paragraph">
      <style:paragraph-properties fo:text-align="justify"/>
    </style:style>
    <style:style style:name="P82" style:parent-style-name="Standard" style:list-style-name="LFO4" style:family="paragraph">
      <style:paragraph-properties fo:text-align="justify"/>
    </style:style>
    <style:style style:name="P83" style:parent-style-name="Standard" style:list-style-name="LFO4" style:family="paragraph">
      <style:paragraph-properties fo:text-align="justify"/>
    </style:style>
    <style:style style:name="P84" style:parent-style-name="Standard" style:list-style-name="LFO4" style:family="paragraph">
      <style:paragraph-properties fo:text-align="justify"/>
    </style:style>
    <style:style style:name="P85" style:parent-style-name="Standard" style:list-style-name="LFO4" style:family="paragraph">
      <style:paragraph-properties fo:text-align="justify"/>
    </style:style>
    <style:style style:name="P86" style:parent-style-name="Standard" style:list-style-name="LFO4" style:family="paragraph">
      <style:paragraph-properties fo:text-align="justify"/>
    </style:style>
    <style:style style:name="P87" style:parent-style-name="Standard" style:list-style-name="LFO4" style:family="paragraph">
      <style:paragraph-properties fo:text-align="justify"/>
    </style:style>
    <style:style style:name="P88" style:parent-style-name="Standard" style:list-style-name="LFO4" style:family="paragraph">
      <style:paragraph-properties fo:text-align="justify"/>
    </style:style>
    <style:style style:name="P89" style:parent-style-name="Standard" style:list-style-name="LFO4" style:family="paragraph">
      <style:paragraph-properties fo:text-align="justify"/>
    </style:style>
    <style:style style:name="P90" style:parent-style-name="Standard" style:list-style-name="LFO4" style:family="paragraph">
      <style:paragraph-properties fo:text-align="justify"/>
    </style:style>
    <style:style style:name="P91" style:parent-style-name="Standard" style:list-style-name="LFO4" style:family="paragraph">
      <style:paragraph-properties fo:text-align="justify"/>
    </style:style>
    <style:style style:name="P92" style:parent-style-name="Standard" style:list-style-name="LFO4" style:family="paragraph">
      <style:paragraph-properties fo:text-align="justify"/>
    </style:style>
    <style:style style:name="P93" style:parent-style-name="Standard" style:list-style-name="LFO4"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text-properties fo:font-weight="bold" style:font-weight-asian="bold" style:font-weight-complex="bold"/>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text-properties fo:font-style="italic" style:font-style-asian="italic" style:font-style-complex="italic"/>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list-style-name="LFO2"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list-style-name="LFO5" style:family="paragraph">
      <style:paragraph-properties fo:text-align="justify"/>
    </style:style>
    <style:style style:name="P110" style:parent-style-name="Standard" style:list-style-name="LFO5"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list-style-name="LFO6" style:family="paragraph">
      <style:paragraph-properties fo:text-align="justify"/>
    </style:style>
    <style:style style:name="P116" style:parent-style-name="Standard" style:list-style-name="LFO6" style:family="paragraph">
      <style:paragraph-properties fo:text-align="justify"/>
    </style:style>
    <style:style style:name="P117" style:parent-style-name="Standard" style:list-style-name="LFO6" style:family="paragraph">
      <style:paragraph-properties fo:text-align="justify"/>
    </style:style>
    <style:style style:name="P118" style:parent-style-name="Standard" style:list-style-name="LFO6"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list-style-name="LFO7" style:family="paragraph">
      <style:paragraph-properties fo:text-align="justify"/>
    </style:style>
    <style:style style:name="P124" style:parent-style-name="Standard" style:list-style-name="LFO7" style:family="paragraph">
      <style:paragraph-properties fo:text-align="justify"/>
    </style:style>
    <style:style style:name="P125" style:parent-style-name="Standard" style:list-style-name="LFO7"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fo:font-weight="bold" style:font-weight-asian="bold" style:font-weight-complex="bold"/>
    </style:style>
    <style:style style:name="P128" style:parent-style-name="Standard" style:family="paragraph">
      <style:paragraph-properties fo:text-align="justify"/>
      <style:text-properties fo:font-weight="bold" style:font-weight-asian="bold" style:font-weight-complex="bold"/>
    </style:style>
    <style:style style:name="P129" style:parent-style-name="Standard" style:family="paragraph">
      <style:paragraph-properties fo:text-align="justify"/>
    </style:style>
    <style:style style:name="T130" style:parent-style-name="Domyślnaczcionkaakapitu" style:family="text">
      <style:text-properties fo:font-weight="bold" style:font-weight-asian="bold" style:font-weight-complex="bold"/>
    </style:style>
    <style:style style:name="P131" style:parent-style-name="Standard" style:family="paragraph">
      <style:paragraph-properties fo:text-align="justify"/>
    </style:style>
    <style:style style:name="P132" style:parent-style-name="Standard" style:list-style-name="LFO8" style:family="paragraph">
      <style:paragraph-properties fo:text-align="justify"/>
    </style:style>
    <style:style style:name="P133" style:parent-style-name="Standard" style:list-style-name="LFO8" style:family="paragraph">
      <style:paragraph-properties fo:text-align="justify"/>
    </style:style>
    <style:style style:name="P134" style:parent-style-name="Standard" style:list-style-name="LFO8" style:family="paragraph">
      <style:paragraph-properties fo:text-align="justify"/>
    </style:style>
    <style:style style:name="P135" style:parent-style-name="Standard" style:list-style-name="LFO8" style:family="paragraph">
      <style:paragraph-properties fo:text-align="justify"/>
    </style:style>
    <style:style style:name="P136" style:parent-style-name="Standard" style:list-style-name="LFO8" style:family="paragraph">
      <style:paragraph-properties fo:text-align="justify"/>
    </style:style>
    <style:style style:name="P137" style:parent-style-name="Standard" style:list-style-name="LFO8" style:family="paragraph">
      <style:paragraph-properties fo:text-align="justify"/>
    </style:style>
    <style:style style:name="P138" style:parent-style-name="Standard" style:list-style-name="LFO8" style:family="paragraph">
      <style:paragraph-properties fo:text-align="justify"/>
    </style:style>
    <style:style style:name="P139" style:parent-style-name="Standard" style:list-style-name="LFO8" style:family="paragraph">
      <style:paragraph-properties fo:text-align="justify"/>
    </style:style>
    <style:style style:name="P140" style:parent-style-name="Standard" style:list-style-name="LFO8" style:family="paragraph">
      <style:paragraph-properties fo:text-align="justify"/>
    </style:style>
    <style:style style:name="P141" style:parent-style-name="Standard" style:list-style-name="LFO8" style:family="paragraph">
      <style:paragraph-properties fo:text-align="justify"/>
    </style:style>
    <style:style style:name="P142" style:parent-style-name="Standard" style:list-style-name="LFO8" style:family="paragraph">
      <style:paragraph-properties fo:text-align="justify"/>
    </style:style>
    <style:style style:name="P143" style:parent-style-name="Standard" style:list-style-name="LFO8" style:family="paragraph">
      <style:paragraph-properties fo:text-align="justify"/>
    </style:style>
    <style:style style:name="P144" style:parent-style-name="Standard" style:list-style-name="LFO8" style:family="paragraph">
      <style:paragraph-properties fo:text-align="justify"/>
    </style:style>
    <style:style style:name="P145" style:parent-style-name="Standard" style:list-style-name="LFO8" style:family="paragraph">
      <style:paragraph-properties fo:text-align="justify"/>
    </style:style>
    <style:style style:name="P146" style:parent-style-name="Standard" style:list-style-name="LFO8" style:family="paragraph">
      <style:paragraph-properties fo:text-align="justify"/>
    </style:style>
    <style:style style:name="P147" style:parent-style-name="Standard" style:list-style-name="LFO8" style:family="paragraph">
      <style:paragraph-properties fo:text-align="justify"/>
    </style:style>
    <style:style style:name="P148" style:parent-style-name="Standard" style:list-style-name="LFO8" style:family="paragraph">
      <style:paragraph-properties fo:text-align="justify"/>
    </style:style>
    <style:style style:name="P149" style:parent-style-name="Standard" style:list-style-name="LFO8" style:family="paragraph">
      <style:paragraph-properties fo:text-align="justify"/>
    </style:style>
    <style:style style:name="P150" style:parent-style-name="Standard" style:list-style-name="LFO8" style:family="paragraph">
      <style:paragraph-properties fo:text-align="justify"/>
    </style:style>
    <style:style style:name="P151" style:parent-style-name="Standard" style:list-style-name="LFO8" style:family="paragraph">
      <style:paragraph-properties fo:text-align="justify"/>
    </style:style>
    <style:style style:name="P152" style:parent-style-name="Standard" style:list-style-name="LFO8" style:family="paragraph">
      <style:paragraph-properties fo:text-align="justify"/>
    </style:style>
    <style:style style:name="P153" style:parent-style-name="Standard" style:list-style-name="LFO8" style:family="paragraph">
      <style:paragraph-properties fo:text-align="justify"/>
    </style:style>
    <style:style style:name="P154" style:parent-style-name="Standard" style:list-style-name="LFO8" style:family="paragraph">
      <style:paragraph-properties fo:text-align="justify"/>
    </style:style>
    <style:style style:name="P155" style:parent-style-name="Standard" style:list-style-name="LFO8" style:family="paragraph">
      <style:paragraph-properties fo:text-align="justify"/>
    </style:style>
    <style:style style:name="P156" style:parent-style-name="Standard" style:list-style-name="LFO8" style:family="paragraph">
      <style:paragraph-properties fo:text-align="justify"/>
    </style:style>
    <style:style style:name="P157" style:parent-style-name="Standard" style:list-style-name="LFO8" style:family="paragraph">
      <style:paragraph-properties fo:text-align="justify"/>
    </style:style>
    <style:style style:name="P158" style:parent-style-name="Standard" style:list-style-name="LFO8" style:family="paragraph">
      <style:paragraph-properties fo:text-align="justify"/>
    </style:style>
    <style:style style:name="P159" style:parent-style-name="Standard" style:list-style-name="LFO8" style:family="paragraph">
      <style:paragraph-properties fo:text-align="justify"/>
    </style:style>
    <style:style style:name="P160" style:parent-style-name="Standard" style:list-style-name="LFO8" style:family="paragraph">
      <style:paragraph-properties fo:text-align="justify"/>
    </style:style>
    <style:style style:name="P161" style:parent-style-name="Standard" style:list-style-name="LFO8" style:family="paragraph">
      <style:paragraph-properties fo:text-align="justify"/>
    </style:style>
    <style:style style:name="P162" style:parent-style-name="Standard" style:list-style-name="LFO8" style:family="paragraph">
      <style:paragraph-properties fo:text-align="justify"/>
    </style:style>
    <style:style style:name="P163" style:parent-style-name="Standard" style:list-style-name="LFO8" style:family="paragraph">
      <style:paragraph-properties fo:text-align="justify"/>
    </style:style>
    <style:style style:name="P164" style:parent-style-name="Standard" style:list-style-name="LFO8" style:family="paragraph">
      <style:paragraph-properties fo:text-align="justify"/>
    </style:style>
    <style:style style:name="P165" style:parent-style-name="Standard" style:list-style-name="LFO8" style:family="paragraph">
      <style:paragraph-properties fo:text-align="justify"/>
    </style:style>
    <style:style style:name="P166" style:parent-style-name="Standard" style:list-style-name="LFO8" style:family="paragraph">
      <style:paragraph-properties fo:text-align="justify"/>
    </style:style>
    <style:style style:name="P167" style:parent-style-name="Standard" style:list-style-name="LFO8" style:family="paragraph">
      <style:paragraph-properties fo:text-align="justify"/>
    </style:style>
    <style:style style:name="P168" style:parent-style-name="Standard" style:list-style-name="LFO8" style:family="paragraph">
      <style:paragraph-properties fo:text-align="justify"/>
    </style:style>
    <style:style style:name="P169" style:parent-style-name="Standard" style:list-style-name="LFO8" style:family="paragraph">
      <style:paragraph-properties fo:text-align="justify"/>
    </style:style>
    <style:style style:name="P170" style:parent-style-name="Standard" style:list-style-name="LFO8" style:family="paragraph">
      <style:paragraph-properties fo:text-align="justify"/>
    </style:style>
    <style:style style:name="P171" style:parent-style-name="Standard" style:list-style-name="LFO8" style:family="paragraph">
      <style:paragraph-properties fo:text-align="justify"/>
    </style:style>
    <style:style style:name="P172" style:parent-style-name="Standard" style:list-style-name="LFO8" style:family="paragraph">
      <style:paragraph-properties fo:text-align="justify"/>
    </style:style>
    <style:style style:name="P173" style:parent-style-name="Standard" style:list-style-name="LFO8" style:family="paragraph">
      <style:paragraph-properties fo:text-align="justify"/>
    </style:style>
    <style:style style:name="P174" style:parent-style-name="Standard" style:list-style-name="LFO8" style:family="paragraph">
      <style:paragraph-properties fo:text-align="justify"/>
    </style:style>
    <style:style style:name="P175" style:parent-style-name="Standard" style:list-style-name="LFO8" style:family="paragraph">
      <style:paragraph-properties fo:text-align="justify"/>
    </style:style>
    <style:style style:name="P176" style:parent-style-name="Standard" style:list-style-name="LFO8" style:family="paragraph">
      <style:paragraph-properties fo:text-align="justify"/>
    </style:style>
    <style:style style:name="P177" style:parent-style-name="Standard" style:list-style-name="LFO8" style:family="paragraph">
      <style:paragraph-properties fo:text-align="justify"/>
    </style:style>
    <style:style style:name="P178" style:parent-style-name="Standard" style:list-style-name="LFO8" style:family="paragraph">
      <style:paragraph-properties fo:text-align="justify"/>
    </style:style>
    <style:style style:name="P179" style:parent-style-name="Standard" style:list-style-name="LFO8" style:family="paragraph">
      <style:paragraph-properties fo:text-align="justify"/>
    </style:style>
    <style:style style:name="P180" style:parent-style-name="Standard" style:list-style-name="LFO8" style:family="paragraph">
      <style:paragraph-properties fo:text-align="justify"/>
    </style:style>
    <style:style style:name="P181" style:parent-style-name="Standard" style:list-style-name="LFO8" style:family="paragraph">
      <style:paragraph-properties fo:text-align="justify"/>
    </style:style>
    <style:style style:name="P182" style:parent-style-name="Standard" style:list-style-name="LFO8" style:family="paragraph">
      <style:paragraph-properties fo:text-align="justify"/>
    </style:style>
    <style:style style:name="P183" style:parent-style-name="Standard" style:list-style-name="LFO8"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text-properties fo:font-weight="bold" style:font-weight-asian="bold" style:font-weight-complex="bold"/>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list-style-name="LFO9"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list-style-name="LFO9" style:family="paragraph">
      <style:paragraph-properties fo:text-align="justify"/>
    </style:style>
    <style:style style:name="P199" style:parent-style-name="Standard" style:list-style-name="LFO9" style:family="paragraph">
      <style:paragraph-properties fo:text-align="justify"/>
    </style:style>
    <style:style style:name="P200" style:parent-style-name="Standard" style:list-style-name="LFO9" style:family="paragraph">
      <style:paragraph-properties fo:text-align="justify"/>
    </style:style>
    <style:style style:name="P201" style:parent-style-name="Standard" style:list-style-name="LFO9" style:family="paragraph">
      <style:paragraph-properties fo:text-align="justify"/>
    </style:style>
    <style:style style:name="P202" style:parent-style-name="Standard" style:list-style-name="LFO9" style:family="paragraph">
      <style:paragraph-properties fo:text-align="justify"/>
    </style:style>
    <style:style style:name="P203" style:parent-style-name="Standard" style:list-style-name="LFO9" style:family="paragraph">
      <style:paragraph-properties fo:text-align="justify"/>
    </style:style>
    <style:style style:name="P204" style:parent-style-name="Standard" style:list-style-name="LFO9" style:family="paragraph">
      <style:paragraph-properties fo:text-align="justify"/>
    </style:style>
    <style:style style:name="P205" style:parent-style-name="Standard" style:list-style-name="LFO9" style:family="paragraph">
      <style:paragraph-properties fo:text-align="justify"/>
    </style:style>
    <style:style style:name="P206" style:parent-style-name="Standard" style:list-style-name="LFO9" style:family="paragraph">
      <style:paragraph-properties fo:text-align="justify"/>
    </style:style>
    <style:style style:name="P207" style:parent-style-name="Standard" style:list-style-name="LFO9" style:family="paragraph">
      <style:paragraph-properties fo:text-align="justify"/>
    </style:style>
    <style:style style:name="P208" style:parent-style-name="Standard" style:list-style-name="LFO9" style:family="paragraph">
      <style:paragraph-properties fo:text-align="justify"/>
    </style:style>
    <style:style style:name="P209" style:parent-style-name="Standard" style:list-style-name="LFO9" style:family="paragraph">
      <style:paragraph-properties fo:text-align="justify"/>
    </style:style>
    <style:style style:name="P210" style:parent-style-name="Standard" style:list-style-name="LFO9"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text-properties fo:font-weight="bold" style:font-weight-asian="bold" style:font-weight-complex="bold"/>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list-style-name="LFO9" style:family="paragraph">
      <style:paragraph-properties fo:text-align="justify"/>
    </style:style>
    <style:style style:name="P219" style:parent-style-name="Standard" style:list-style-name="LFO9" style:family="paragraph">
      <style:paragraph-properties fo:text-align="justify"/>
    </style:style>
    <style:style style:name="P220" style:parent-style-name="Standard" style:list-style-name="LFO9" style:family="paragraph">
      <style:paragraph-properties fo:text-align="justify"/>
    </style:style>
    <style:style style:name="P221" style:parent-style-name="Standard" style:list-style-name="LFO9"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list-style-name="LFO9" style:family="paragraph">
      <style:paragraph-properties fo:text-align="justify"/>
    </style:style>
    <style:style style:name="P225" style:parent-style-name="Standard" style:list-style-name="LFO9" style:family="paragraph">
      <style:paragraph-properties fo:text-align="justify"/>
    </style:style>
    <style:style style:name="P226" style:parent-style-name="Standard" style:list-style-name="LFO9" style:family="paragraph">
      <style:paragraph-properties fo:text-align="justify"/>
    </style:style>
    <style:style style:name="P227" style:parent-style-name="Standard" style:list-style-name="LFO9" style:family="paragraph">
      <style:paragraph-properties fo:text-align="justify"/>
    </style:style>
    <style:style style:name="P228" style:parent-style-name="Standard" style:list-style-name="LFO9"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list-style-name="LFO9" style:family="paragraph">
      <style:paragraph-properties fo:text-align="justify"/>
    </style:style>
    <style:style style:name="P232" style:parent-style-name="Standard" style:list-style-name="LFO9" style:family="paragraph">
      <style:paragraph-properties fo:text-align="justify"/>
    </style:style>
    <style:style style:name="P233" style:parent-style-name="Standard" style:list-style-name="LFO9" style:family="paragraph">
      <style:paragraph-properties fo:text-align="justify"/>
    </style:style>
    <style:style style:name="P234" style:parent-style-name="Standard" style:list-style-name="LFO9" style:family="paragraph">
      <style:paragraph-properties fo:text-align="justify"/>
    </style:style>
    <style:style style:name="P235" style:parent-style-name="Standard" style:list-style-name="LFO9" style:family="paragraph">
      <style:paragraph-properties fo:text-align="justify"/>
    </style:style>
    <style:style style:name="P236" style:parent-style-name="Standard" style:list-style-name="LFO9" style:family="paragraph">
      <style:paragraph-properties fo:text-align="justify"/>
    </style:style>
    <style:style style:name="P237" style:parent-style-name="Standard" style:list-style-name="LFO9" style:family="paragraph">
      <style:paragraph-properties fo:text-align="justify"/>
    </style:style>
    <style:style style:name="P238" style:parent-style-name="Standard" style:list-style-name="LFO9"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text-properties fo:font-weight="bold" style:font-weight-asian="bold" style:font-weight-complex="bold"/>
    </style:style>
    <style:style style:name="P251" style:parent-style-name="Standard" style:family="paragraph">
      <style:paragraph-properties fo:text-align="justify"/>
      <style:text-properties fo:font-weight="bold" style:font-weight-asian="bold" style:font-weight-complex="bold"/>
    </style:style>
    <style:style style:name="P252" style:parent-style-name="Standard" style:family="paragraph">
      <style:paragraph-properties fo:text-align="justify"/>
    </style:style>
    <style:style style:name="T253" style:parent-style-name="Domyślnaczcionkaakapitu" style:family="text">
      <style:text-properties fo:font-weight="bold" style:font-weight-asian="bold" style:font-weight-complex="bold"/>
    </style:style>
    <style:style style:name="P254" style:parent-style-name="Standard" style:family="paragraph">
      <style:paragraph-properties fo:text-align="justify"/>
    </style:style>
    <style:style style:name="P255" style:parent-style-name="Standard" style:family="paragraph">
      <style:paragraph-properties fo:text-align="justify"/>
      <style:text-properties fo:font-style="italic" style:font-style-asian="italic" style:font-style-complex="italic"/>
    </style:style>
    <style:style style:name="P256" style:parent-style-name="Standard" style:family="paragraph">
      <style:paragraph-properties fo:text-align="justify"/>
      <style:text-properties fo:font-weight="bold" style:font-weight-asian="bold" style:font-weight-complex="bold"/>
    </style:style>
    <style:style style:name="P257" style:parent-style-name="Standard" style:family="paragraph">
      <style:paragraph-properties fo:text-align="justify"/>
      <style:text-properties fo:font-weight="bold" style:font-weight-asian="bold" style:font-weight-complex="bold"/>
    </style:style>
    <style:style style:name="P258" style:parent-style-name="Standard" style:family="paragraph">
      <style:paragraph-properties fo:text-align="justify"/>
      <style:text-properties fo:font-weight="bold" style:font-weight-asian="bold" style:font-weight-complex="bold"/>
    </style:style>
    <style:style style:name="P259" style:parent-style-name="Standard" style:family="paragraph">
      <style:paragraph-properties fo:text-align="justify"/>
      <style:text-properties fo:font-weight="bold" style:font-weight-asian="bold" style:font-weight-complex="bold"/>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text-properties fo:font-style="italic" style:font-style-asian="italic" style:font-style-complex="italic"/>
    </style:style>
    <style:style style:name="P265" style:parent-style-name="Standard" style:family="paragraph">
      <style:paragraph-properties fo:text-align="justify"/>
    </style:style>
    <style:style style:name="T266" style:parent-style-name="Domyślnaczcionkaakapitu" style:family="text">
      <style:text-properties fo:font-style="italic" style:font-style-asian="italic" style:font-style-complex="italic"/>
    </style:style>
    <style:style style:name="P267" style:parent-style-name="Standard" style:list-style-name="LFO2" style:family="paragraph">
      <style:paragraph-properties fo:text-align="justify"/>
    </style:style>
    <style:style style:name="P268" style:parent-style-name="Standard" style:list-style-name="LFO2"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list-style-name="LFO10" style:family="paragraph">
      <style:paragraph-properties fo:text-align="justify"/>
    </style:style>
    <style:style style:name="P272" style:parent-style-name="Standard" style:list-style-name="LFO10" style:family="paragraph">
      <style:paragraph-properties fo:text-align="justify"/>
    </style:style>
    <style:style style:name="P273" style:parent-style-name="Standard" style:list-style-name="LFO10" style:family="paragraph">
      <style:paragraph-properties fo:text-align="justify"/>
    </style:style>
    <style:style style:name="P274" style:parent-style-name="Standard" style:family="paragraph">
      <style:paragraph-properties fo:text-align="justify"/>
      <style:text-properties fo:font-style="italic" style:font-style-asian="italic" style:font-style-complex="italic"/>
    </style:style>
    <style:style style:name="P275" style:parent-style-name="Standard" style:family="paragraph">
      <style:paragraph-properties fo:text-align="justify"/>
      <style:text-properties fo:font-style="italic" style:font-style-asian="italic" style:font-style-complex="italic"/>
    </style:style>
    <style:style style:name="P276" style:parent-style-name="Standard" style:family="paragraph">
      <style:paragraph-properties fo:text-align="justify"/>
    </style:style>
    <style:style style:name="T277" style:parent-style-name="Domyślnaczcionkaakapitu" style:family="text">
      <style:text-properties fo:font-style="italic" style:font-style-asian="italic" style:font-style-complex="italic"/>
    </style:style>
    <style:style style:name="P278" style:parent-style-name="Standard" style:list-style-name="LFO3" style:family="paragraph">
      <style:paragraph-properties fo:text-align="justify"/>
    </style:style>
    <style:style style:name="P279" style:parent-style-name="Standard" style:list-style-name="LFO3" style:family="paragraph">
      <style:paragraph-properties fo:text-align="justify"/>
    </style:style>
    <style:style style:name="P280" style:parent-style-name="Standard" style:list-style-name="LFO3" style:family="paragraph">
      <style:paragraph-properties fo:text-align="justify"/>
    </style:style>
    <style:style style:name="P281" style:parent-style-name="Standard" style:list-style-name="LFO3" style:family="paragraph">
      <style:paragraph-properties fo:text-align="justify"/>
    </style:style>
    <style:style style:name="P282" style:parent-style-name="Standard" style:list-style-name="LFO3" style:family="paragraph">
      <style:paragraph-properties fo:text-align="justify"/>
    </style:style>
    <style:style style:name="P283" style:parent-style-name="Standard" style:list-style-name="LFO3" style:family="paragraph">
      <style:paragraph-properties fo:text-align="justify"/>
    </style:style>
    <style:style style:name="P284" style:parent-style-name="Standard" style:list-style-name="LFO11" style:family="paragraph">
      <style:paragraph-properties fo:text-align="justify"/>
    </style:style>
    <style:style style:name="P285" style:parent-style-name="Standard" style:list-style-name="LFO11" style:family="paragraph">
      <style:paragraph-properties fo:text-align="justify"/>
    </style:style>
    <style:style style:name="P286" style:parent-style-name="Standard" style:list-style-name="LFO11" style:family="paragraph">
      <style:paragraph-properties fo:text-align="justify"/>
    </style:style>
    <style:style style:name="P287" style:parent-style-name="Standard" style:list-style-name="LFO11" style:family="paragraph">
      <style:paragraph-properties fo:text-align="justify"/>
    </style:style>
    <style:style style:name="P288" style:parent-style-name="Standard" style:list-style-name="LFO11" style:family="paragraph">
      <style:paragraph-properties fo:text-align="justify"/>
    </style:style>
    <style:style style:name="P289" style:parent-style-name="Standard" style:list-style-name="LFO11" style:family="paragraph">
      <style:paragraph-properties fo:text-align="justify"/>
    </style:style>
    <style:style style:name="P290" style:parent-style-name="Standard" style:list-style-name="LFO11" style:family="paragraph">
      <style:paragraph-properties fo:text-align="justify"/>
    </style:style>
    <style:style style:name="P291" style:parent-style-name="Standard" style:list-style-name="LFO11" style:family="paragraph">
      <style:paragraph-properties fo:text-align="justify"/>
    </style:style>
    <style:style style:name="P292" style:parent-style-name="Standard" style:list-style-name="LFO11" style:family="paragraph">
      <style:paragraph-properties fo:text-align="justify"/>
    </style:style>
    <style:style style:name="P293" style:parent-style-name="Standard" style:list-style-name="LFO11"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T296" style:parent-style-name="DefaultParagraphFont" style:family="text">
      <style:text-properties fo:font-style="italic" style:font-style-asian="italic" style:font-style-complex="italic"/>
    </style:style>
    <style:style style:name="P297" style:parent-style-name="Standard" style:family="paragraph">
      <style:paragraph-properties fo:text-align="justify"/>
    </style:style>
    <style:style style:name="P298" style:parent-style-name="Standard" style:family="paragraph">
      <style:paragraph-properties fo:text-align="justify"/>
      <style:text-properties fo:font-weight="bold" style:font-weight-asian="bold" style:font-weight-complex="bold"/>
    </style:style>
    <style:style style:name="P299" style:parent-style-name="Standard" style:family="paragraph">
      <style:paragraph-properties fo:text-align="justify"/>
      <style:text-properties fo:font-weight="bold" style:font-weight-asian="bold" style:font-weight-complex="bold"/>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list-style-name="LFO12" style:family="paragraph">
      <style:paragraph-properties fo:text-align="justify"/>
    </style:style>
    <style:style style:name="P306" style:parent-style-name="Standard" style:list-style-name="LFO13" style:family="paragraph">
      <style:paragraph-properties fo:text-align="justify"/>
    </style:style>
    <style:style style:name="P307" style:parent-style-name="Standard" style:list-style-name="LFO13" style:family="paragraph">
      <style:paragraph-properties fo:text-align="justify"/>
    </style:style>
    <style:style style:name="P308" style:parent-style-name="Standard" style:list-style-name="LFO13" style:family="paragraph">
      <style:paragraph-properties fo:text-align="justify"/>
    </style:style>
    <style:style style:name="P309" style:parent-style-name="Standard" style:list-style-name="LFO13" style:family="paragraph">
      <style:paragraph-properties fo:text-align="justify"/>
    </style:style>
    <style:style style:name="P310" style:parent-style-name="Standard" style:list-style-name="LFO13" style:family="paragraph">
      <style:paragraph-properties fo:text-align="justify"/>
    </style:style>
    <style:style style:name="T311" style:parent-style-name="Domyślnaczcionkaakapitu" style:family="text">
      <style:text-properties fo:font-style="italic" style:font-style-asian="italic" style:font-style-complex="italic"/>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T314" style:parent-style-name="DefaultParagraphFont" style:family="text">
      <style:text-properties fo:font-style="italic" style:font-style-asian="italic" style:font-style-complex="italic"/>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list-style-name="LFO3" style:family="paragraph">
      <style:paragraph-properties fo:text-align="justify"/>
    </style:style>
    <style:style style:name="P318" style:parent-style-name="Standard" style:list-style-name="LFO3" style:family="paragraph">
      <style:paragraph-properties fo:text-align="justify"/>
    </style:style>
    <style:style style:name="P319" style:parent-style-name="Standard" style:list-style-name="LFO3" style:family="paragraph">
      <style:paragraph-properties fo:text-align="justify"/>
    </style:style>
    <style:style style:name="P320" style:parent-style-name="Standard" style:list-style-name="LFO3" style:family="paragraph">
      <style:paragraph-properties fo:text-align="justify"/>
    </style:style>
    <style:style style:name="P321" style:parent-style-name="Standard" style:list-style-name="LFO3" style:family="paragraph">
      <style:paragraph-properties fo:text-align="justify"/>
    </style:style>
    <style:style style:name="P322" style:parent-style-name="Standard" style:list-style-name="LFO3" style:family="paragraph">
      <style:paragraph-properties fo:text-align="justify"/>
    </style:style>
    <style:style style:name="P323" style:parent-style-name="Standard" style:list-style-name="LFO3" style:family="paragraph">
      <style:paragraph-properties fo:text-align="justify"/>
    </style:style>
    <style:style style:name="P324" style:parent-style-name="Standard" style:list-style-name="LFO3" style:family="paragraph">
      <style:paragraph-properties fo:text-align="justify"/>
    </style:style>
    <style:style style:name="P325" style:parent-style-name="Standard" style:list-style-name="LFO3" style:family="paragraph">
      <style:paragraph-properties fo:text-align="justify"/>
    </style:style>
    <style:style style:name="P326" style:parent-style-name="Standard" style:list-style-name="LFO3" style:family="paragraph">
      <style:paragraph-properties fo:text-align="justify"/>
    </style:style>
    <style:style style:name="P327" style:parent-style-name="Standard" style:list-style-name="LFO3" style:family="paragraph">
      <style:paragraph-properties fo:text-align="justify"/>
    </style:style>
    <style:style style:name="T328" style:parent-style-name="Domyślnaczcionkaakapitu" style:family="text">
      <style:text-properties fo:font-style="italic" style:font-style-asian="italic" style:font-style-complex="italic"/>
    </style:style>
    <style:style style:name="P329" style:parent-style-name="Standard" style:list-style-name="LFO3" style:family="paragraph">
      <style:paragraph-properties fo:text-align="justify"/>
    </style:style>
    <style:style style:name="P330" style:parent-style-name="Standard" style:list-style-name="LFO3" style:family="paragraph">
      <style:paragraph-properties fo:text-align="justify"/>
    </style:style>
    <style:style style:name="P331" style:parent-style-name="Standard" style:list-style-name="LFO3"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text-properties fo:font-weight="bold" style:font-weight-asian="bold" style:font-weight-complex="bold"/>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fo:text-indent="0.25in"/>
    </style:style>
    <style:style style:name="P345" style:parent-style-name="Standard" style:list-style-name="LFO3" style:family="paragraph">
      <style:paragraph-properties fo:text-align="justify"/>
    </style:style>
    <style:style style:name="P346" style:parent-style-name="Standard" style:list-style-name="LFO3" style:family="paragraph">
      <style:paragraph-properties fo:text-align="justify"/>
    </style:style>
    <style:style style:name="P347" style:parent-style-name="Standard" style:list-style-name="LFO3" style:family="paragraph">
      <style:paragraph-properties fo:text-align="justify"/>
    </style:style>
    <style:style style:name="P348" style:parent-style-name="Standard" style:family="paragraph">
      <style:paragraph-properties fo:text-align="justify" fo:margin-left="0.4923in">
        <style:tab-stops/>
      </style:paragraph-properties>
    </style:style>
    <style:style style:name="P349" style:parent-style-name="Standard" style:family="paragraph">
      <style:paragraph-properties fo:text-align="justify" fo:margin-left="0.4923in">
        <style:tab-stops/>
      </style:paragraph-properties>
    </style:style>
    <style:style style:name="P350" style:parent-style-name="Standard" style:family="paragraph">
      <style:paragraph-properties fo:text-align="justify" fo:margin-left="0.4923in">
        <style:tab-stops/>
      </style:paragraph-properties>
    </style:style>
    <style:style style:name="P351" style:parent-style-name="Standard" style:family="paragraph">
      <style:paragraph-properties fo:text-align="justify" fo:margin-left="0.4923in">
        <style:tab-stops/>
      </style:paragraph-properties>
    </style:style>
    <style:style style:name="P352" style:parent-style-name="Standard" style:family="paragraph">
      <style:paragraph-properties fo:text-align="justify" fo:margin-left="0.4923in">
        <style:tab-stops/>
      </style:paragraph-properties>
    </style:style>
    <style:style style:name="P353" style:parent-style-name="Standard" style:family="paragraph">
      <style:paragraph-properties fo:text-align="justify"/>
    </style:style>
    <style:style style:name="P354" style:parent-style-name="Standard" style:family="paragraph">
      <style:paragraph-properties fo:text-align="justify" fo:margin-left="0.5in">
        <style:tab-stops/>
      </style:paragraph-properties>
    </style:style>
    <style:style style:name="P355" style:parent-style-name="Standard" style:list-style-name="LFO13" style:family="paragraph">
      <style:paragraph-properties fo:text-align="justify" fo:text-indent="0in"/>
    </style:style>
    <style:style style:name="P356" style:parent-style-name="Standard" style:list-style-name="LFO13" style:family="paragraph">
      <style:paragraph-properties fo:text-align="justify" fo:text-indent="0in"/>
    </style:style>
    <style:style style:name="P357" style:parent-style-name="Standard" style:list-style-name="LFO13" style:family="paragraph">
      <style:paragraph-properties fo:text-align="justify" fo:text-indent="0in"/>
    </style:style>
    <style:style style:name="P358" style:parent-style-name="Standard" style:family="paragraph">
      <style:paragraph-properties fo:text-align="justify"/>
    </style:style>
    <style:style style:name="P359" style:parent-style-name="Standard" style:list-style-name="LFO13" style:family="paragraph"/>
    <style:style style:name="P360" style:parent-style-name="Standard" style:family="paragraph">
      <style:paragraph-properties fo:text-align="justify" fo:margin-left="0.4923in">
        <style:tab-stops/>
      </style:paragraph-properties>
    </style:style>
    <style:style style:name="P361" style:parent-style-name="Standard" style:family="paragraph">
      <style:paragraph-properties fo:text-align="justify" fo:margin-left="0.4923in">
        <style:tab-stops/>
      </style:paragraph-properties>
    </style:style>
    <style:style style:name="P362" style:parent-style-name="Standard" style:family="paragraph">
      <style:paragraph-properties fo:text-align="justify" fo:margin-left="0.4923in">
        <style:tab-stops/>
      </style:paragraph-properties>
    </style:style>
    <style:style style:name="P363" style:parent-style-name="Standard" style:family="paragraph">
      <style:paragraph-properties fo:text-align="justify" fo:margin-left="0.4923in">
        <style:tab-stops/>
      </style:paragraph-properties>
    </style:style>
    <style:style style:name="P364" style:parent-style-name="Standard" style:family="paragraph">
      <style:paragraph-properties fo:text-align="justify" fo:margin-left="0.4923in">
        <style:tab-stops/>
      </style:paragraph-properties>
    </style:style>
    <style:style style:name="P365" style:parent-style-name="Standard" style:family="paragraph">
      <style:paragraph-properties fo:text-align="justify" fo:margin-left="0.4923in">
        <style:tab-stops/>
      </style:paragraph-properties>
    </style:style>
    <style:style style:name="P366" style:parent-style-name="Standard" style:family="paragraph">
      <style:paragraph-properties fo:text-align="justify" fo:margin-left="0.4923in">
        <style:tab-stops/>
      </style:paragraph-properties>
    </style:style>
    <style:style style:name="P367" style:parent-style-name="Standard" style:family="paragraph">
      <style:paragraph-properties fo:text-align="justify" fo:margin-left="0.4923in">
        <style:tab-stops/>
      </style:paragraph-properties>
    </style:style>
    <style:style style:name="P368" style:parent-style-name="Standard" style:family="paragraph">
      <style:paragraph-properties fo:text-align="justify" fo:margin-left="0.4923in">
        <style:tab-stops/>
      </style:paragraph-properties>
    </style:style>
    <style:style style:name="P369" style:parent-style-name="Standard" style:family="paragraph">
      <style:paragraph-properties fo:text-align="justify" fo:margin-left="0.4923in">
        <style:tab-stops/>
      </style:paragraph-properties>
    </style:style>
    <style:style style:name="P370" style:parent-style-name="Standard" style:family="paragraph">
      <style:paragraph-properties fo:text-align="justify" fo:margin-left="0.9847in">
        <style:tab-stops/>
      </style:paragraph-properties>
    </style:style>
    <style:style style:name="P371" style:parent-style-name="Standard" style:family="paragraph">
      <style:paragraph-properties fo:text-align="justify" fo:margin-left="0.9847in">
        <style:tab-stops/>
      </style:paragraph-properties>
    </style:style>
    <style:style style:name="P372" style:parent-style-name="Standard" style:family="paragraph">
      <style:paragraph-properties fo:text-align="justify" fo:margin-left="0.9847in">
        <style:tab-stops/>
      </style:paragraph-properties>
    </style:style>
    <style:style style:name="P373" style:parent-style-name="Standard" style:family="paragraph">
      <style:paragraph-properties fo:text-align="justify"/>
      <style:text-properties fo:font-style="italic" style:font-style-asian="italic" style:font-style-complex="italic"/>
    </style:style>
    <style:style style:name="P374" style:parent-style-name="Standard" style:family="paragraph">
      <style:paragraph-properties fo:text-align="justify" fo:margin-left="0.4923in">
        <style:tab-stops/>
      </style:paragraph-properties>
    </style:style>
    <style:style style:name="P375" style:parent-style-name="Standard" style:family="paragraph">
      <style:paragraph-properties fo:text-align="justify" fo:margin-left="0.4923in">
        <style:tab-stops/>
      </style:paragraph-properties>
    </style:style>
    <style:style style:name="P376" style:parent-style-name="Standard" style:family="paragraph">
      <style:paragraph-properties fo:text-align="justify" fo:text-indent="0.4923in"/>
    </style:style>
    <style:style style:name="P377" style:parent-style-name="Standard" style:list-style-name="LFO3" style:family="paragraph">
      <style:paragraph-properties fo:text-align="justify"/>
    </style:style>
    <style:style style:name="P378" style:parent-style-name="Standard" style:list-style-name="LFO3" style:family="paragraph">
      <style:paragraph-properties fo:text-align="justify"/>
    </style:style>
    <style:style style:name="P379" style:parent-style-name="Standard" style:list-style-name="LFO3" style:family="paragraph">
      <style:paragraph-properties fo:text-align="justify"/>
    </style:style>
    <style:style style:name="P380" style:parent-style-name="Standard" style:list-style-name="LFO3" style:family="paragraph">
      <style:paragraph-properties fo:text-align="justify"/>
    </style:style>
    <style:style style:name="P381" style:parent-style-name="Standard" style:list-style-name="LFO3" style:family="paragraph">
      <style:paragraph-properties fo:text-align="justify"/>
    </style:style>
    <style:style style:name="P382" style:parent-style-name="Standard" style:list-style-name="LFO3" style:family="paragraph">
      <style:paragraph-properties fo:text-align="justify"/>
    </style:style>
    <style:style style:name="P383" style:parent-style-name="Standard" style:list-style-name="LFO3" style:family="paragraph">
      <style:paragraph-properties fo:text-align="justify"/>
    </style:style>
    <style:style style:name="P384" style:parent-style-name="Standard" style:list-style-name="LFO3" style:family="paragraph">
      <style:paragraph-properties fo:text-align="justify"/>
    </style:style>
    <style:style style:name="T385" style:parent-style-name="Domyślnaczcionkaakapitu" style:family="text">
      <style:text-properties fo:font-style="italic" style:font-style-asian="italic" style:font-style-complex="italic"/>
    </style:style>
    <style:style style:name="P386" style:parent-style-name="Standard" style:list-style-name="LFO3" style:family="paragraph">
      <style:paragraph-properties fo:text-align="justify"/>
    </style:style>
    <style:style style:name="P387" style:parent-style-name="Standard" style:list-style-name="LFO3" style:family="paragraph">
      <style:paragraph-properties fo:text-align="justify"/>
    </style:style>
    <style:style style:name="P388" style:parent-style-name="Standard" style:list-style-name="LFO3" style:family="paragraph">
      <style:paragraph-properties fo:text-align="justify"/>
    </style:style>
    <style:style style:name="T389" style:parent-style-name="Domyślnaczcionkaakapitu" style:family="text">
      <style:text-properties fo:font-style="italic" style:font-style-asian="italic" style:font-style-complex="italic"/>
    </style:style>
    <style:style style:name="P390" style:parent-style-name="Standard" style:list-style-name="LFO3" style:family="paragraph">
      <style:paragraph-properties fo:text-align="justify"/>
    </style:style>
    <style:style style:name="P391" style:parent-style-name="Standard" style:list-style-name="LFO3" style:family="paragraph">
      <style:paragraph-properties fo:text-align="justify"/>
    </style:style>
    <style:style style:name="P392" style:parent-style-name="Standard" style:list-style-name="LFO3" style:family="paragraph">
      <style:paragraph-properties fo:text-align="justify"/>
    </style:style>
    <style:style style:name="P393" style:parent-style-name="Standard" style:family="paragraph">
      <style:paragraph-properties fo:text-align="justify" fo:margin-left="0.4923in">
        <style:tab-stops/>
      </style:paragraph-properties>
    </style:style>
  </office:automatic-styles>
  <office:body>
    <office:text text:use-soft-page-breaks="true">
      <text:p text:style-name="P1">SvanNET API Documentation</text:p>
      <text:p text:style-name="P2">BETA version 2.3, 17.07.2024</text:p>
      <text:p text:style-name="P3"/>
      <text:p text:style-name="P4">1. Stations</text:p>
      <text:p text:style-name="P5"/>
      <text:p text:style-name="P6"><text:a xlink:href="https://svannet.com/api/v2/stations-get-list.php" office:target-frame-name="_top" xlink:show="replace"><text:span text:style-name="T7">https://svannet.com/api/v2.3/stations-get-list.php</text:span></text:a></text:p>
      <text:p text:style-name="P8"/>
      <text:p text:style-name="P9">Note: All timestamps in responses returned by this request are expressed in time zone relevant for the caller's user account setting in SvanNET.</text:p>
      <text:p text:style-name="P10"/>
      <text:p text:style-name="P11"><text:tab/>Lists stations associated with user account. Informations include basic parameters, current connection state and status information collected by SvanNET during last status check.</text:p>
      <text:p text:style-name="P12"/>
      <text:p text:style-name="P13">Input parameters (required):</text:p>
      <text:list text:style-name="LFO2" text:continue-numbering="true">
        <text:list-item>
          <text:list>
            <text:list-item>
              <text:p text:style-name="P14">key (POST) – <text:s/>access token configured with API access token tool by the account owner.</text:p>
            </text:list-item>
          </text:list>
        </text:list-item>
      </text:list>
      <text:p text:style-name="P15"/>
      <text:p text:style-name="P16">Input parameters (optional):</text:p>
      <text:list text:style-name="LFO2" text:continue-numbering="true">
        <text:list-item>
          <text:list>
            <text:list-item>
              <text:p text:style-name="P17">station (POST) – serial number of the station, if provided the query will only return the information about this serial number.</text:p>
            </text:list-item>
          </text:list>
        </text:list-item>
      </text:list>
      <text:p text:style-name="P18"/>
      <text:p text:style-name="P19"><text:tab/>Output information (JSON):</text:p>
      <text:list text:style-name="LFO3" text:continue-numbering="true">
        <text:list-item>
          <text:list>
            <text:list-item>
              <text:p text:style-name="P20">status – status of the processed request (text):</text:p>
              <text:list text:continue-numbering="true">
                <text:list-item>
                  <text:p text:style-name="P21">ok – status processed correctly</text:p>
                </text:list-item>
                <text:list-item>
                  <text:p text:style-name="P22">account doesn't exist – account with provided e-mail does not exist</text:p>
                </text:list-item>
                <text:list-item>
                  <text:p text:style-name="P23">account inactive – account is inactive and requests will not be processed until activated by SvanNET Administration</text:p>
                </text:list-item>
                <text:list-item>
                  <text:p text:style-name="P24">terms not accepted – account has not accepted terms of use</text:p>
                </text:list-item>
                <text:list-item>
                  <text:p text:style-name="P25">wrong password – password provided is incorrect</text:p>
                </text:list-item>
                <text:list-item>
                  <text:p text:style-name="P26">any other value – temporary system error, attempting the request at later time may be successful</text:p>
                </text:list-item>
              </text:list>
            </text:list-item>
            <text:list-item>
              <text:p text:style-name="P27">stations – if status is 'ok', list of the stations will follow. Each station JSON object will contain several standard parameters and several optional, depending on the current state of the station's operations within the system.</text:p>
              <text:list text:continue-numbering="true">
                <text:list-item>
                  <text:p text:style-name="P28">serial (int) – serial number of the station</text:p>
                </text:list-item>
                <text:list-item>
                  <text:p text:style-name="P29">type (text) – type of the meter</text:p>
                </text:list-item>
                <text:list-item>
                  <text:p text:style-name="P30">user-text (text) – user inputted name for the station</text:p>
                </text:list-item>
                <text:list-item>
                  <text:p text:style-name="P31">active (boolean) – denotes whether the station is active or inactive in the system. An inactive station is prevented any operations and may only be activated again by SvanNET Administration</text:p>
                </text:list-item>
                <text:list-item>
                  <text:p text:style-name="P32">is-online (boolean) – denotes whether the station is currently online in SvanNET</text:p>
                </text:list-item>
                <text:list-item>
                  <text:p text:style-name="P33">last-login (timestamp) – time when the station has connected last</text:p>
                </text:list-item>
                <text:list-item>
                  <text:p text:style-name="P34">last-logout (timestamp) – time when the station has disconnected last</text:p>
                </text:list-item>
                <text:list-item>
                  <text:p text:style-name="P35">meter-firmware (decimal) – version of the meter's current firmware</text:p>
                </text:list-item>
                <text:list-item>
                  <text:p text:style-name="P36">controller-firmware (decimal, optional) – version of the station's controller current firmware (available only for stations that use a dedicated controller, e.g. SV 277)</text:p>
                </text:list-item>
                <text:list-item>
                  <text:p text:style-name="P37">last-status-timestamp (timestamp) – time of the last status check; all below status information are valid for this time</text:p>
                </text:list-item>
                <text:list-item>
                  <text:p text:style-name="P38">battery-charge-code (int vector, optional) – battery charge information relevant for SV 25x / SV 27x controllers. The vector consists either of 1 or 2 values. The first denotes station's accumulater, the second – external battery, if connected. The codes are interpreted as follows:</text:p>
                  <text:list text:continue-numbering="true">
                    <text:list-item>
                      <text:p text:style-name="P39">3 – above 50% or above 80% (controller firmware 2.02+)</text:p>
                    </text:list-item>
                    <text:list-item>
                      <text:p text:style-name="P40">2 – between 20% and 50% or between 20 % and 50% (controller firmware 2.02+)</text:p>
                    </text:list-item>
                    <text:list-item>
                      <text:p text:style-name="P41">1 – below 20%</text:p>
                    </text:list-item>
                    <text:list-item>
                      <text:p text:style-name="P42">0 – completely discharged</text:p>
                    </text:list-item>
                  </text:list>
                </text:list-item>
                <text:list-item>
                  <text:p text:style-name="P43">battery-charge (int, optional) – percentage value of the available battery charge (will not be shown if station has controller or, in some cases, when mains is connected)</text:p>
                </text:list-item>
                <text:list-item>
                  <text:p text:style-name="P44">power-source (text) – current source of power for the station</text:p>
                  <text:list text:continue-numbering="true">
                    <text:list-item>
                      <text:p text:style-name="P45">battery-aa – station powered from the meter's exchangable batteries (AA)</text:p>
                    </text:list-item>
                    <text:list-item>
                      <text:p text:style-name="P46">battery-solar – station has functioning solar panel, but is currently powered from accumulator (either because of overcast or charge/discharge cycles)</text:p>
                    </text:list-item>
                    <text:list-item>
                      <text:p text:style-name="P47">battery-station – station's accumulator</text:p>
                    </text:list-item>
                    <text:list-item>
                      <text:p text:style-name="P48">battery-external – external battery connected to the station</text:p>
                    </text:list-item>
                    <text:list-item>
                      <text:p text:style-name="P49">mains</text:p>
                    </text:list-item>
                    <text:list-item>
                      <text:p text:style-name="P50">solar – solar panel</text:p>
                    </text:list-item>
                    <text:list-item>
                      <text:p text:style-name="P51">unknown – unable to read the station's current power source; if persistent, may indicate equipment failure</text:p>
                    </text:list-item>
                  </text:list>
                </text:list-item>
                <text:list-item>
                  <text:p text:style-name="P52">is-battery-charging (boolean, optional) – denotes if the station's accumulator is currently being charged from mains / solar (reported by some stations)</text:p>
                </text:list-item>
                <text:list-item>
                  <text:p text:style-name="P53">is-battery-charging-complete (boolean, optional) – denotes if the station's charging cycle has been completed (reported by some stations)</text:p>
                </text:list-item>
                <text:list-item>
                  <text:p text:style-name="P54">battery-time-to-full (int, optional) and battery-time-to-empty (int, optional) – alternating, this information denotes the time it will take for the battery to be fully charged from mains/solar and, respectively, the time it will take for the battery to be completed discharged. Expressed as hours*10+(minutes / 6). Value equal 100 or greater than 10000 denotes no correct reading (temporary).</text:p>
                </text:list-item>
                <text:list-item>
                  <text:p text:style-name="P55">gsm-signal-quality (int, optional) – represents signal quality reading of connection between the station's GSM modem (if applicable) and the operator's network. It translates directly to dBm level between -113 and -51 when used with the following calculation: 113 – 2*value. Typically, the values are interpreted for the user by SvanNET as follows:</text:p>
                  <text:list text:continue-numbering="true">
                    <text:list-item>
                      <text:p text:style-name="P56">99 – modem could not read Signal Quality</text:p>
                    </text:list-item>
                    <text:list-item>
                      <text:p text:style-name="P57">0 – no signal</text:p>
                    </text:list-item>
                    <text:list-item>
                      <text:p text:style-name="P58">1-5 – very poor quality</text:p>
                    </text:list-item>
                    <text:list-item>
                      <text:p text:style-name="P59">6-7 – poor quality</text:p>
                    </text:list-item>
                    <text:list-item>
                      <text:p text:style-name="P60">8-11 – good quality</text:p>
                    </text:list-item>
                    <text:list-item>
                      <text:p text:style-name="P61">12+ - very good quality</text:p>
                    </text:list-item>
                  </text:list>
                </text:list-item>
              </text:list>
            </text:list-item>
          </text:list>
        </text:list-item>
      </text:list>
      <text:p text:style-name="P62"><text:tab/><text:tab/>Values 0 may still be returned while the station is online. It denotes extremely poor<text:s/><text:tab/><text:tab/>conditions that does not warrant a stable connection.</text:p>
      <text:list text:style-name="LFO4" text:continue-numbering="true">
        <text:list-item>
          <text:list>
            <text:list-item>
              <text:list>
                <text:list-item>
                  <text:p text:style-name="P63">memory-free (int, optional) – expressed in bytes, it represents the current free memory space of the instrument (typically, the SD card; available for majority of Svantek instruments)</text:p>
                </text:list-item>
                <text:list-item>
                  <text:p text:style-name="P64">memory-free-results (int, optional) <text:s/>and memory-free-loggers (int, optional) – for the 958/958A/958AG instruments, the two represent the independent memory storages for result/WAVE files and loggers. Expressed in bytes.</text:p>
                </text:list-item>
                <text:list-item>
                  <text:p text:style-name="P65">memory-free-percent (int, optional) <text:s/>- denotes percentage of meter's memory that is free (available for some instruments)</text:p>
                </text:list-item>
                <text:list-item>
                  <text:p text:style-name="P66">gps-quality (text, optional), gps-latitude (decimal, optional), gps-longitude (decimal, optional) – for some instrument, GPS information is available.</text:p>
                  <text:list text:continue-numbering="true">
                    <text:list-item>
                      <text:p text:style-name="P67">gps-quality represents the current status of the GPS module:</text:p>
                      <text:list text:continue-numbering="true">
                        <text:list-item>
                          <text:p text:style-name="P68">No module – module not detected</text:p>
                        </text:list-item>
                        <text:list-item>
                          <text:p text:style-name="P69">No fix – module cannot fix the signal, no accurate localization or time sync is available</text:p>
                        </text:list-item>
                        <text:list-item>
                          <text:p text:style-name="P70">Ok – signal fixed correctly</text:p>
                        </text:list-item>
                        <text:list-item>
                          <text:p text:style-name="P71">Innacurate – signal may be inaccurate</text:p>
                        </text:list-item>
                      </text:list>
                    </text:list-item>
                    <text:list-item>
                      <text:p text:style-name="P72">gps-latitude and gps-longitude represent geolocalization latitude and longitude respectively in degrees, decimal format, with negative values denoting Western and Southern hemispheres.</text:p>
                    </text:list-item>
                  </text:list>
                </text:list-item>
                <text:list-item>
                  <text:p text:style-name="P73">warning-level (int) – the overall level of severity of outstanding status of the station, as interpreted by SvanNET:</text:p>
                  <text:list text:continue-numbering="true">
                    <text:list-item>
                      <text:p text:style-name="P74">0 – station operating properly</text:p>
                    </text:list-item>
                    <text:list-item>
                      <text:p text:style-name="P75">1 – warning, station operates properly, but it may encounter issues soon</text:p>
                    </text:list-item>
                    <text:list-item>
                      <text:p text:style-name="P76">2 - error, station may not operate properly</text:p>
                    </text:list-item>
                  </text:list>
                </text:list-item>
                <text:list-item>
                  <text:p text:style-name="P77">warning-list (text vector) – list of outstanding statuses, either interpreted by SvanNET or delivered by the station direcelty. If no warnings are to be reported, this field holds empty vector. Expressed as message information, the possible warnings are as follow (list is not exhaustive):</text:p>
                  <text:list text:continue-numbering="true">
                    <text:list-item>
                      <text:p text:style-name="P78">Measurements not running / Measurements stopped (error)</text:p>
                    </text:list-item>
                    <text:list-item>
                      <text:p text:style-name="P79">Low logger memory (error)</text:p>
                    </text:list-item>
                    <text:list-item>
                      <text:p text:style-name="P80">Low result memory (error)</text:p>
                    </text:list-item>
                    <text:list-item>
                      <text:p text:style-name="P81">Low memory (error)</text:p>
                    </text:list-item>
                    <text:list-item>
                      <text:p text:style-name="P82">Mains disconnected (warning)</text:p>
                    </text:list-item>
                    <text:list-item>
                      <text:p text:style-name="P83">No solar charge (warning)</text:p>
                    </text:list-item>
                    <text:list-item>
                      <text:p text:style-name="P84">System check failed (error)</text:p>
                    </text:list-item>
                    <text:list-item>
                      <text:p text:style-name="P85">External battery below 20% (error)</text:p>
                    </text:list-item>
                    <text:list-item>
                      <text:p text:style-name="P86">External battery below 50% (warning)</text:p>
                    </text:list-item>
                    <text:list-item>
                      <text:p text:style-name="P87">Station battery empty (error)</text:p>
                    </text:list-item>
                    <text:list-item>
                      <text:p text:style-name="P88">Station battery below 20% (error)</text:p>
                    </text:list-item>
                    <text:list-item>
                      <text:p text:style-name="P89">Station battery below 50% (error)</text:p>
                    </text:list-item>
                    <text:list-item>
                      <text:p text:style-name="P90">Change battery (error)</text:p>
                    </text:list-item>
                    <text:list-item>
                      <text:p text:style-name="P91">Low battery (error)</text:p>
                    </text:list-item>
                    <text:list-item>
                      <text:p text:style-name="P92">Low temperature (error)</text:p>
                    </text:list-item>
                    <text:list-item>
                      <text:p text:style-name="P93">Meteo error (error)</text:p>
                    </text:list-item>
                  </text:list>
                </text:list-item>
              </text:list>
            </text:list-item>
          </text:list>
        </text:list-item>
      </text:list>
      <text:p text:style-name="P94"><text:tab/><text:tab/></text:p>
      <text:p text:style-name="P95">2. Projects</text:p>
      <text:p text:style-name="P96"><text:tab/></text:p>
      <text:p text:style-name="P97"><text:a xlink:href="https://svannet.com/api/projects-get-data.php" office:target-frame-name="_top" xlink:show="replace">https://svannet.com/api/v2.3/projects-get-data.php</text:a></text:p>
      <text:p text:style-name="P98"/>
      <text:p text:style-name="P99">Note: All timestamps in responses returned by this request are expressed in time zone relevant for the caller's user account setting in SvanNET.</text:p>
      <text:p text:style-name="P100"/>
      <text:p text:style-name="P101"><text:tab/>Offers a limited interfacing with projects linked to the user account. The actual action that the request performs is dependent on the provided arguments and the type of configured token.</text:p>
      <text:p text:style-name="P102"/>
      <text:p text:style-name="P103"><text:tab/>Input parameters (required):</text:p>
      <text:list text:style-name="LFO2" text:continue-numbering="true">
        <text:list-item>
          <text:list>
            <text:list-item>
              <text:p text:style-name="P104">key (POST) – <text:s/>access token configured with API access token tool by the account owner.</text:p>
            </text:list-item>
          </text:list>
        </text:list-item>
      </text:list>
      <text:p text:style-name="P105"/>
      <text:p text:style-name="P106"><text:tab/>Providing only the required parameters will result in the request providing list of accessible projects and measurement points. See section 2.1.</text:p>
      <text:p text:style-name="P107"/>
      <text:p text:style-name="P108"><text:tab/>Input parameters (optional):</text:p>
      <text:list text:style-name="LFO5" text:continue-numbering="true">
        <text:list-item>
          <text:list>
            <text:list-item>
              <text:p text:style-name="P109">project (POST) – id of the project (as returned by project-get-data project listing)</text:p>
            </text:list-item>
            <text:list-item>
              <text:p text:style-name="P110">point (POST) – id of the measurement point (as returned by project-get-data project listing)</text:p>
            </text:list-item>
          </text:list>
        </text:list-item>
      </text:list>
      <text:p text:style-name="P111"/>
      <text:p text:style-name="P112"><text:tab/>Providing only project parameter will output project/point listing as described in section 2.1 except that it will only output regarding project with the provided id. Providing both project and point<text:s/><text:soft-page-break/>parameters will output files downloaded by the Automatic Download for the measurement point with this parameters as described in section 2.2</text:p>
      <text:p text:style-name="P113"/>
      <text:p text:style-name="P114"><text:tab/>Input parameters (optional):</text:p>
      <text:list text:style-name="LFO6" text:continue-numbering="true">
        <text:list-item>
          <text:list>
            <text:list-item>
              <text:p text:style-name="P115">station_type (POST) – type code of the station form which the file was downloaded (as returned by the file listing)</text:p>
            </text:list-item>
            <text:list-item>
              <text:p text:style-name="P116">station_serial (POST) – serial number of the station from which the file was downloaded (as returned by the file listing)</text:p>
            </text:list-item>
            <text:list-item>
              <text:p text:style-name="P117">day_code (POST) – day code of the file (as returned by the file listing)</text:p>
            </text:list-item>
            <text:list-item>
              <text:p text:style-name="P118">filename (POST) – name of the file (as returned by the file listing)</text:p>
            </text:list-item>
          </text:list>
        </text:list-item>
      </text:list>
      <text:p text:style-name="P119"/>
      <text:p text:style-name="P120"><text:tab/>Providing these arguments, along with project and point will result in returning the contents of the selected file in raw form. See section 2.3.</text:p>
      <text:p text:style-name="P121"/>
      <text:p text:style-name="P122"><text:tab/>Input parameters (optional):</text:p>
      <text:list text:style-name="LFO7" text:continue-numbering="true">
        <text:list-item>
          <text:list>
            <text:list-item>
              <text:p text:style-name="P123">action (POST) – performs specific action other than returning the contents of the file:</text:p>
              <text:list text:continue-numbering="true">
                <text:list-item>
                  <text:p text:style-name="P124">1 – download file as CSV: this will cause SvanNET to export the file to CSV format <text:s/>(this is currently different than the instrument CSV format) and send the exported contents. Viable for SVN / SVR and SVL file types. Any other file will return failure.</text:p>
                </text:list-item>
                <text:list-item>
                  <text:p text:style-name="P125">2 – delete file from SvanNET: this will cause SvanNET to mark selected file as deleted. The file will not be removed from the instrument's memory, only from SvanNET and the subsequent Automatic Download downloading cycles will not redownloaded it again.</text:p>
                </text:list-item>
              </text:list>
            </text:list-item>
          </text:list>
        </text:list-item>
      </text:list>
      <text:p text:style-name="P126"/>
      <text:p text:style-name="P127">2. 1.<text:s/><text:tab/>Project point listing</text:p>
      <text:p text:style-name="P128"/>
      <text:p text:style-name="P129"><text:span text:style-name="T130"><text:tab/></text:span>The returned content is in JSON format and has the following fields:</text:p>
      <text:p text:style-name="P131"/>
      <text:list text:style-name="LFO8" text:continue-numbering="true">
        <text:list-item>
          <text:list>
            <text:list-item>
              <text:p text:style-name="P132">status – status of the request process:</text:p>
              <text:list text:continue-numbering="true">
                <text:list-item>
                  <text:p text:style-name="P133">ok – request processed successfully</text:p>
                </text:list-item>
                <text:list-item>
                  <text:p text:style-name="P134">invalid parameters – incorrect parameters (missing required)</text:p>
                </text:list-item>
                <text:list-item>
                  <text:p text:style-name="P135">no auth – incorrect authorization token</text:p>
                </text:list-item>
                <text:list-item>
                  <text:p text:style-name="P136">query count exceeded daily limit – exceeded the amount of daily query allowance (default: 1500) for all keys associated with premium account</text:p>
                </text:list-item>
                <text:list-item>
                  <text:p text:style-name="P137">any other message is temporary system problem</text:p>
                </text:list-item>
              </text:list>
            </text:list-item>
            <text:list-item>
              <text:p text:style-name="P138">projects – list of projects linked to the user account (through ownership or sharing). Each position holds the following fields:</text:p>
              <text:list text:continue-numbering="true">
                <text:list-item>
                  <text:p text:style-name="P139">id (int) – numerical identifier of the project in the system. This identifier is used as 'project' parameter in any subsequent calls to fetch files list, download or delete files using project-get-data.php request.</text:p>
                </text:list-item>
                <text:list-item>
                  <text:p text:style-name="P140">project_name (text) – name of the project</text:p>
                </text:list-item>
                <text:list-item>
                  <text:p text:style-name="P141">location (text) – location of the project</text:p>
                </text:list-item>
                <text:list-item>
                  <text:p text:style-name="P142">project_description (text) – description of the project</text:p>
                </text:list-item>
                <text:list-item>
                  <text:p text:style-name="P143">afd_download_en (char) – denotes the state of Automatic Download:</text:p>
                  <text:list text:continue-numbering="true">
                    <text:list-item>
                      <text:p text:style-name="P144">Y – enabled</text:p>
                    </text:list-item>
                    <text:list-item>
                      <text:p text:style-name="P145">N – disabled</text:p>
                    </text:list-item>
                  </text:list>
                </text:list-item>
                <text:list-item>
                  <text:p text:style-name="P146">afd_download_mask (mask) – denotes the files that will be downloaded by Automatic Download:</text:p>
                  <text:list text:continue-numbering="true">
                    <text:list-item>
                      <text:p text:style-name="P147">0x01 – Results</text:p>
                    </text:list-item>
                    <text:list-item>
                      <text:p text:style-name="P148">0x02 – Loggers</text:p>
                    </text:list-item>
                    <text:list-item>
                      <text:p text:style-name="P149">0x04 – Waves</text:p>
                    </text:list-item>
                    <text:list-item>
                      <text:p text:style-name="P150">0x10 – CSV (instrument files)</text:p>
                    </text:list-item>
                    <text:list-item>
                      <text:p text:style-name="P151">afd_clear_mode (int) – clearing mode set for Automatic Download:</text:p>
                      <text:list text:continue-numbering="true">
                        <text:list-item>
                          <text:p text:style-name="P152">0 – none</text:p>
                        </text:list-item>
                        <text:list-item>
                          <text:p text:style-name="P153">1 – hourly</text:p>
                        </text:list-item>
                        <text:list-item>
                          <text:p text:style-name="P154">2 – daily</text:p>
                        </text:list-item>
                        <text:list-item>
                          <text:p text:style-name="P155">3 – weekly</text:p>
                        </text:list-item>
                        <text:list-item>
                          <text:p text:style-name="P156">4 – monthly</text:p>
                        </text:list-item>
                      </text:list>
                    </text:list-item>
                    <text:list-item>
                      <text:p text:style-name="P157">afd_clear_day (int) – day in a month to perform clearing. Viable for weekly and monthly afd_clear_mode</text:p>
                    </text:list-item>
                    <text:list-item>
                      <text:p text:style-name="P158">afd_clear_time (int) – expressed in hours*60 + minutes, denotes the time of day clearing will be performed. Viable for daily, weekly and monthly afd_clear_mode.</text:p>
                    </text:list-item>
                    <text:list-item>
                      <text:p text:style-name="P159">afd_rtc_tolerance (int) – denotes the minmal offset of station's close versus system clock that will trigger synchronization during clearing procedure. 0 denotes time sychronization disabled.</text:p>
                    </text:list-item>
                    <text:list-item>
                      <text:p text:style-name="P160">afd_rtc_tz (text) – timezone used for time synchronization.</text:p>
                    </text:list-item>
                    <text:list-item>
                      <text:p text:style-name="P161">afd_download_period (int) – interval of downloading cycle expressed in minutes. 0 denotes continuous, as in another cycle will start immediately after the previous one is concluded.</text:p>
                    </text:list-item>
                    <text:list-item>
                      <text:p text:style-name="P162">afd_cleanup_limit (int) – storage usage condition that will trigger deleting files from this project (afd_cleanup_days setting). Expressed in percents, it denotes the remaining free space of the project owner's account that, upon meeting the criterial will trigger deleting files from this project. 0 denotes 'any' – the procedure will delete files regardless of the current account storage usage.</text:p>
                    </text:list-item>
                    <text:list-item>
                      <text:p text:style-name="P163">afd_cleanup_days (int) – age of files, expressed in days, used as condition for deleting files from this project. The age is measured since the files' creation time in the instrument and the procedure is performed once per day on midnight GMT. The value 0 (default) denotes the deleting procedure to be disabled entirely. If afd_cleanup_limit is greater 0, it will also use this setting as additional condition to initiate the procedure.</text:p>
                    </text:list-item>
                    <text:list-item>
                      <text:p text:style-name="P164">permission_name (text) – project access information for the request originator (as per login information). Detailed permissions are described in consecutive fields.. The values are:</text:p>
                      <text:list text:continue-numbering="true">
                        <text:list-item>
                          <text:p text:style-name="P165">owner – owner of the project. Full access.</text:p>
                        </text:list-item>
                        <text:list-item>
                          <text:p text:style-name="P166">administrator – administrator access. Full access, except for deleting the project.</text:p>
                        </text:list-item>
                        <text:list-item>
                          <text:p text:style-name="P167">manager access – manager access. May administer downloaded data, some of the project configuration options are not permitted.</text:p>
                        </text:list-item>
                        <text:list-item>
                          <text:p text:style-name="P168">guest access – guest access. Limited permissions, may only browse selected data.</text:p>
                        </text:list-item>
                      </text:list>
                    </text:list-item>
                    <text:list-item>
                      <text:p text:style-name="P169">permission_stations_live_data_read (boolean) – denotes if access to live view of stations in the project is permitted for the request originator</text:p>
                    </text:list-item>
                    <text:list-item>
                      <text:p text:style-name="P170">permission_stations_configure (boolean) – denotes if access to configuration of stations in the project is permitted for the request originator</text:p>
                    </text:list-item>
                    <text:list-item>
                      <text:p text:style-name="P171">permission_files_read (boolean) – denotes if reading files / measurement data downloaded by Automatic Download is permitted for the request originator</text:p>
                    </text:list-item>
                    <text:list-item>
                      <text:p text:style-name="P172">permission_files_write (boolean) – denotes if altering/deleting files / measurement data downloaded by Automatic Dowload is permitted for the request originator</text:p>
                    </text:list-item>
                    <text:list-item>
                      <text:p text:style-name="P173">permission_project_configure (boolean) – denotes if changing project's parameters is permitted for the request originator</text:p>
                    </text:list-item>
                    <text:list-item>
                      <text:p text:style-name="P174">permission_project_sharing (boolean) – denotes if changing project's sharing is permitted for the request originator</text:p>
                    </text:list-item>
                    <text:list-item>
                      <text:p text:style-name="P175">permission_project_afd (boolean) – denotes if changing project's Automatic Download configuration is permitted for request originator</text:p>
                    </text:list-item>
                    <text:list-item>
                      <text:p text:style-name="P176">stations – list of measurement points in the project. Each entry has the following properties:</text:p>
                      <text:list text:continue-numbering="true">
                        <text:list-item>
                          <text:p text:style-name="P177">point_id (int) – identifier of the point in the project. This identifier is used in any subsequent calls as 'point' parameter to fetch files list, download or delete files using project-get-data.php request.</text:p>
                        </text:list-item>
                        <text:list-item>
                          <text:p text:style-name="P178">serial (int) – serial number of attached station. If 0, no station is currently attached to the measurement point</text:p>
                        </text:list-item>
                        <text:list-item>
                          <text:p text:style-name="P179">name (text) – name of the measurement point</text:p>
                        </text:list-item>
                        <text:list-item>
                          <text:p text:style-name="P180">short_name (text) – short name of the measurement point</text:p>
                        </text:list-item>
                        <text:list-item>
                          <text:p text:style-name="P181">description (text) – description of the measurement point</text:p>
                        </text:list-item>
                        <text:list-item>
                          <text:p text:style-name="P182">latitude (decimal) – latitude of the measurement point</text:p>
                        </text:list-item>
                        <text:list-item>
                          <text:p text:style-name="P183">longitude (decimal) – longitude of the measurement point</text:p>
                        </text:list-item>
                      </text:list>
                    </text:list-item>
                  </text:list>
                </text:list-item>
              </text:list>
            </text:list-item>
          </text:list>
        </text:list-item>
      </text:list>
      <text:p text:style-name="P184"/>
      <text:p text:style-name="P185">2.2 Files listing</text:p>
      <text:p text:style-name="P186"/>
      <text:p text:style-name="P187"><text:tab/>The returned content is in JSON format as has the following fields:</text:p>
      <text:p text:style-name="P188"/>
      <text:list text:style-name="LFO9" text:continue-numbering="true">
        <text:list-item>
          <text:list>
            <text:list-item>
              <text:p text:style-name="P189">status – the status of processed request:</text:p>
              <text:list text:continue-numbering="true">
                <text:list-item>
                  <text:p text:style-name="P190">ok – request successfully processed</text:p>
                </text:list-item>
                <text:list-item>
                  <text:p text:style-name="P191">invalid parameters – missing login and password information</text:p>
                </text:list-item>
                <text:list-item>
                  <text:p text:style-name="P192">incorrect credentials – incorrect loging or password</text:p>
                </text:list-item>
                <text:list-item>
                  <text:p text:style-name="P193">terms not accepted – user has not accepted Terms of Service</text:p>
                </text:list-item>
                <text:list-item>
                  <text:p text:style-name="P194">query count exceeded daily limit – exceeded the amount of daily query allowance (default: 1500) for all keys associated with premium account</text:p>
                </text:list-item>
                <text:list-item>
                  <text:p text:style-name="P195">any other message is temporary system problem</text:p>
                </text:list-item>
              </text:list>
            </text:list-item>
            <text:list-item>
              <text:p text:style-name="P196">files – list of files downloaded by Automatic Download for selected measurement point. Each entry is an 8 element vector of different variable type. The variables of the vector are as follows as per index order:</text:p>
              <text:list text:continue-numbering="true">
                <text:list-item>
                  <text:p text:style-name="P197">0: filename (text) – name of the file</text:p>
                </text:list-item>
                <text:list-item>
                  <text:p text:style-name="P198">1: measurement point id (int) – point's identifier</text:p>
                </text:list-item>
                <text:list-item>
                  <text:p text:style-name="P199">2: day code (text) – code of the day of the file, used as day_code argument for project-get-data.php file operations</text:p>
                </text:list-item>
                <text:list-item>
                  <text:p text:style-name="P200">3: file size (int) – expressed in bytes</text:p>
                </text:list-item>
                <text:list-item>
                  <text:p text:style-name="P201">4: station type (int) – station type code, used as station_type argument for project-get-data.php file operations</text:p>
                </text:list-item>
                <text:list-item>
                  <text:p text:style-name="P202">5: station_serial (int) - station serial number, used as station_type argument for project-get-data.php file operations</text:p>
                </text:list-item>
                <text:list-item>
                  <text:p text:style-name="P203">6: modification date (datetime) – date &amp; time of file's last modification on SvanNET storage</text:p>
                </text:list-item>
                <text:list-item>
                  <text:p text:style-name="P204">7: status (int) – download status of the file:</text:p>
                  <text:list text:continue-numbering="true">
                    <text:list-item>
                      <text:p text:style-name="P205">0 - file not completely downloaded; if the file is in the instrument, Project's Automatic Download will continue downloading it if properly configured</text:p>
                    </text:list-item>
                    <text:list-item>
                      <text:p text:style-name="P206">1 – file completely downloaded</text:p>
                    </text:list-item>
                    <text:list-item>
                      <text:p text:style-name="P207">2 – file completely downloaded, but not uploaded to FTP</text:p>
                    </text:list-item>
                    <text:list-item>
                      <text:p text:style-name="P208">3 – file corrupted; SvanNET will not download it anymore, but will not delete it from the meter during clearing</text:p>
                    </text:list-item>
                  </text:list>
                </text:list-item>
                <text:list-item>
                  <text:p text:style-name="P209">8: index (int) – index of the file in this listing</text:p>
                </text:list-item>
              </text:list>
            </text:list-item>
            <text:list-item>
              <text:p text:style-name="P210">file_size (int) – total size of files in this listing</text:p>
            </text:list-item>
          </text:list>
        </text:list-item>
      </text:list>
      <text:p text:style-name="P211"/>
      <text:p text:style-name="P212"/>
      <text:p text:style-name="P213"/>
      <text:p text:style-name="P214"/>
      <text:soft-page-break/>
      <text:p text:style-name="P215">2.3 File actions</text:p>
      <text:p text:style-name="P216"/>
      <text:p text:style-name="P217"><text:tab/>The returned content is dependent on the provided arguments. Without providing action parameter, it will simply return the contents of the file, outputting the raw binary data as octet-stream with proper HTTP headers. Should the request fail to be processed, a JSON response will be outputted, with status field holding one of possible values:</text:p>
      <text:list text:style-name="LFO9" text:continue-numbering="true">
        <text:list-item>
          <text:list>
            <text:list-item>
              <text:p text:style-name="P218">invalid parameters – missing login and password information</text:p>
            </text:list-item>
            <text:list-item>
              <text:p text:style-name="P219">incorrect credentials – incorrect loging or password</text:p>
            </text:list-item>
            <text:list-item>
              <text:p text:style-name="P220">terms not accepted – user has not accepted Terms of Service</text:p>
            </text:list-item>
            <text:list-item>
              <text:p text:style-name="P221">data does not exist – selected file does not exist or is temporarily unavailable</text:p>
            </text:list-item>
          </text:list>
        </text:list-item>
      </text:list>
      <text:p text:style-name="P222"/>
      <text:p text:style-name="P223"><text:tab/>When provided with action argument equal to 1, the call will function exactly as described in previous paragraph, except the content will be exported CSV format. Should the request fail to be processed, a JSON response will be outputted, with status field holding one of possible values:</text:p>
      <text:list text:style-name="LFO9" text:continue-numbering="true">
        <text:list-item>
          <text:list>
            <text:list-item>
              <text:p text:style-name="P224">invalid parameters – missing login and password information</text:p>
            </text:list-item>
            <text:list-item>
              <text:p text:style-name="P225">incorrect credentials – incorrect loging or password</text:p>
            </text:list-item>
            <text:list-item>
              <text:p text:style-name="P226">terms not accepted – user has not accepted Terms of Service</text:p>
            </text:list-item>
            <text:list-item>
              <text:p text:style-name="P227">data does not exist – selected file does not exist or is temporarily unavailable</text:p>
            </text:list-item>
            <text:list-item>
              <text:p text:style-name="P228">failed to export to CSV - exporting function failed (most often cause is corrupted file or wrong file for export)</text:p>
            </text:list-item>
          </text:list>
        </text:list-item>
      </text:list>
      <text:p text:style-name="P229"/>
      <text:p text:style-name="P230"><text:tab/>When provided with action argument equal to 2, the call will delete the selected file from SvanNET as described at the beginning of section 2. The response will be in JSON format, with singular status filed having one of the possible values:</text:p>
      <text:list text:style-name="LFO9" text:continue-numbering="true">
        <text:list-item>
          <text:list>
            <text:list-item>
              <text:p text:style-name="P231">ok – request processed successfully</text:p>
            </text:list-item>
            <text:list-item>
              <text:p text:style-name="P232">invalid parameters – missing login and password information</text:p>
            </text:list-item>
            <text:list-item>
              <text:p text:style-name="P233">incorrect credentials – incorrect loging or password</text:p>
            </text:list-item>
            <text:list-item>
              <text:p text:style-name="P234">terms not accepted – user has not accepted Terms of Service</text:p>
            </text:list-item>
            <text:list-item>
              <text:p text:style-name="P235">query count exceeded daily limit – exceeded the amount of daily query allowance (default: 1500) for all keys associated with premium account</text:p>
            </text:list-item>
            <text:list-item>
              <text:p text:style-name="P236">data does not exist – selected file does not exist or is temporarily unavailable</text:p>
            </text:list-item>
            <text:list-item>
              <text:p text:style-name="P237">data not available AFD – request failed because Automatic File Download locked the file from modification; AFD locks perists on files not considered by the system as 'closed' by the instrument. This usually denotes the newest files of each type (SVL, CSV, WAV).</text:p>
            </text:list-item>
            <text:list-item>
              <text:p text:style-name="P238">failed to delete – request failed due to unknown reason; trying again later may be successful</text:p>
            </text:list-item>
          </text:list>
        </text:list-item>
      </text:list>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3. Projects measurement data</text:p>
      <text:p text:style-name="P251"/>
      <text:p text:style-name="P252"><text:span text:style-name="T253"><text:tab/></text:span>The following queries relate to retrieving measurement data acquired by SvanNET during Auto Download procedure.</text:p>
      <text:p text:style-name="P254"/>
      <text:soft-page-break/>
      <text:p text:style-name="P255">Note: All timestamps in responses returned by these request are expressed in time zone relevant for the instrument's setting during its measurement.</text:p>
      <text:p text:style-name="P256"/>
      <text:p text:style-name="P257"/>
      <text:p text:style-name="P258"/>
      <text:p text:style-name="P259">3.1 Results listing</text:p>
      <text:p text:style-name="P260"><text:tab/></text:p>
      <text:p text:style-name="P261"><text:a xlink:href="https://svannet.com/api/v2.2/projects-get-result-list.php" office:target-frame-name="_top" xlink:show="replace"><text:span text:style-name="Hiperłącze">https://svannet.com/api/v2.3/projects-get-result-list.php</text:span></text:a></text:p>
      <text:p text:style-name="P262"/>
      <text:p text:style-name="P263"><text:tab/>Provides a listing of results recorded in target project.</text:p>
      <text:p text:style-name="P264"/>
      <text:p text:style-name="P265"><text:span text:style-name="T266"><text:tab/></text:span>Input parameters (required):</text:p>
      <text:list text:style-name="LFO2" text:continue-numbering="true">
        <text:list-item>
          <text:list>
            <text:list-item>
              <text:p text:style-name="P267">key (POST) – <text:s/>access token configured with API access token tool by the account owner.</text:p>
            </text:list-item>
            <text:list-item>
              <text:p text:style-name="P268">project (POST) – project identifier as per listing in request 2</text:p>
            </text:list-item>
          </text:list>
        </text:list-item>
      </text:list>
      <text:p text:style-name="P269"/>
      <text:p text:style-name="P270"><text:tab/>Input parameters (optional)</text:p>
      <text:list text:style-name="LFO10" text:continue-numbering="true">
        <text:list-item>
          <text:list>
            <text:list-item>
              <text:p text:style-name="P271">point (POST) – measurement point identifier; if ommited, the listing will include results for all measurement points, otherwise it will only list for provided point</text:p>
            </text:list-item>
            <text:list-item>
              <text:p text:style-name="P272">time_from (POST) – time formatted in YYYY-MM-DD hh:mm:ss; if this parameter set, it will only return those result types that have data later than provided time</text:p>
            </text:list-item>
            <text:list-item>
              <text:p text:style-name="P273">time_to (POST) – time formatted in YYYY-MM-DD hh:mm:ss; if this parameter set, it will only return those result types that have data earlier than provided time</text:p>
            </text:list-item>
          </text:list>
        </text:list-item>
      </text:list>
      <text:p text:style-name="P274"/>
      <text:p text:style-name="P275"/>
      <text:p text:style-name="P276"><text:span text:style-name="T277"><text:tab/></text:span>Output information (JSON):</text:p>
      <text:list text:style-name="LFO3" text:continue-numbering="true">
        <text:list-item>
          <text:list>
            <text:list-item>
              <text:p text:style-name="P278">status – status of the processed request (text):</text:p>
              <text:list text:continue-numbering="true">
                <text:list-item>
                  <text:p text:style-name="P279">ok – status processed correctly</text:p>
                </text:list-item>
                <text:list-item>
                  <text:p text:style-name="P280">invalid parameters – incorrect parameters (missing required)</text:p>
                </text:list-item>
                <text:list-item>
                  <text:p text:style-name="P281">no auth – incorrect authorization token</text:p>
                </text:list-item>
                <text:list-item>
                  <text:p text:style-name="P282">query count exceeded daily limit – exceeded the amount of daily query allowance (default: 1500) for all keys associated with premium account</text:p>
                </text:list-item>
                <text:list-item>
                  <text:p text:style-name="P283">any other value – temporary system error, attempting the request at later time may be successful</text:p>
                </text:list-item>
              </text:list>
            </text:list-item>
          </text:list>
        </text:list-item>
      </text:list>
      <text:list text:style-name="LFO11" text:continue-numbering="true">
        <text:list-item>
          <text:list>
            <text:list-item>
              <text:p text:style-name="P284">data (if status = “ok”) - list of available result types from the given project (including point, time_from and time_to filters). Each element in this list consists of the following fields:</text:p>
              <text:list text:continue-numbering="true">
                <text:list-item>
                  <text:p text:style-name="P285">key_code – unique code for the result to be used in Result data (3.2)</text:p>
                </text:list-item>
                <text:list-item>
                  <text:p text:style-name="P286">key – name of the result</text:p>
                </text:list-item>
                <text:list-item>
                  <text:p text:style-name="P287">point – measurement point identifier denoting which measurement point it was recorded in</text:p>
                </text:list-item>
                <text:list-item>
                  <text:p text:style-name="P288">integration - “TH” (time history) or “SR” (summary results)</text:p>
                </text:list-item>
                <text:list-item>
                  <text:p text:style-name="P289">time_from – start time of downloaded result samples</text:p>
                </text:list-item>
                <text:list-item>
                  <text:p text:style-name="P290">time_to – end time of downloaded result samples</text:p>
                </text:list-item>
                <text:list-item>
                  <text:p text:style-name="P291">spectrum – (optional) if the result is a spectrum, it denotes the type of spectrum</text:p>
                </text:list-item>
                <text:list-item>
                  <text:p text:style-name="P292">channel – (optional) if result is channel dependent and instrument used in measurement is multi-channel, number or name of the channel the result was recorded in</text:p>
                </text:list-item>
                <text:list-item>
                  <text:p text:style-name="P293">aggregations – (optional) some results also have aggregated data available for download from SvanNET system. In such case, this field will consist an associative array of a key (‘minute’ or ‘hour’) and time_from + time_to pairs. Each such entry informs of an available aggregation of specific type (minute being a 1 minute aggregation synchronized to full minute and hour being a 1 hour aggregation synchronized to full hour) and time range for which the aggregated result is available.<text:s/><text:soft-page-break/>The algorithm used for aggregation is dependent on the result type (ex. Leq is typically a logarithmic average while Lmax is a maximum for the given aggregation step).</text:p>
                </text:list-item>
              </text:list>
            </text:list-item>
          </text:list>
        </text:list-item>
      </text:list>
      <text:p text:style-name="P294"/>
      <text:p text:style-name="P295"><text:tab/><text:tab/><text:span text:style-name="T296">Note: please note that aggregated results typically become available in the system with a delay. Typically, an aggregated result will become available up to around two hours after the system downloads data from the instrument.</text:span></text:p>
      <text:p text:style-name="P297"/>
      <text:p text:style-name="P298">3.2 Results data</text:p>
      <text:p text:style-name="P299"/>
      <text:p text:style-name="P300"><text:a xlink:href="https://svannet.com/api/v2.2/projects-get-result-data.php" office:target-frame-name="_top" xlink:show="replace"><text:span text:style-name="Hiperłącze">https://svannet.com/api/v2.3/projects-get-result-data.php</text:span></text:a></text:p>
      <text:p text:style-name="P301"/>
      <text:p text:style-name="P302"><text:tab/>Returns data for provided results list.</text:p>
      <text:p text:style-name="P303"/>
      <text:p text:style-name="P304"><text:tab/>Input parameters (required):</text:p>
      <text:list text:style-name="LFO12" text:continue-numbering="true">
        <text:list-item>
          <text:list>
            <text:list-item>
              <text:p text:style-name="P305">key (POST) – <text:s/>access token configured with API access token tool by the account owner.</text:p>
            </text:list-item>
          </text:list>
        </text:list-item>
      </text:list>
      <text:list text:style-name="LFO13" text:continue-numbering="true">
        <text:list-item>
          <text:list>
            <text:list-item>
              <text:p text:style-name="P306">project (POST) – project identifier as per listing in request 2</text:p>
            </text:list-item>
            <text:list-item>
              <text:p text:style-name="P307">point (POST) – point identifier as per listing in request 2 or 3.1</text:p>
            </text:list-item>
            <text:list-item>
              <text:p text:style-name="P308">time_from (POST) – starting time of time range for which the results data is to be returned</text:p>
            </text:list-item>
            <text:list-item>
              <text:p text:style-name="P309">time_to (POST) – end time of time range for which the results data is to be returned</text:p>
            </text:list-item>
            <text:list-item>
              <text:p text:style-name="P310">results – a list of<text:s/><text:span text:style-name="T311">key_code<text:s/></text:span>'s indicating the desired selection of results (at least 1)</text:p>
            </text:list-item>
          </text:list>
        </text:list-item>
      </text:list>
      <text:p text:style-name="P312"/>
      <text:p text:style-name="P313"><text:tab/><text:span text:style-name="T314">Note: when download aggregated data for chosen results, key_codes must be appended with a dash (-) and key for selected aggregation. For instance, a leq-S-T-0-0-N key_code will fetch unaggregated Leq data. But leq-S-T-0-0-N-minute will fetch Leq data aggregated for period of 1 minute.</text:span></text:p>
      <text:p text:style-name="P315"/>
      <text:p text:style-name="P316"><text:tab/>Output information (JSON):</text:p>
      <text:list text:style-name="LFO3" text:continue-numbering="true">
        <text:list-item>
          <text:list>
            <text:list-item>
              <text:p text:style-name="P317">status – status of the processed request (text):</text:p>
              <text:list text:continue-numbering="true">
                <text:list-item>
                  <text:p text:style-name="P318">ok – status processed correctly</text:p>
                </text:list-item>
                <text:list-item>
                  <text:p text:style-name="P319">invalid parameters – incorrect parameters (missing required) or results has zero components</text:p>
                </text:list-item>
                <text:list-item>
                  <text:p text:style-name="P320">no auth – incorrect authorization token</text:p>
                </text:list-item>
                <text:list-item>
                  <text:p text:style-name="P321">query count exceeded daily limit – exceeded the amount of daily query allowance (default: 1500) for all keys associated with premium account</text:p>
                </text:list-item>
                <text:list-item>
                  <text:p text:style-name="P322">any other value – temporary system error, attempting the request at later time may be successful</text:p>
                </text:list-item>
              </text:list>
            </text:list-item>
            <text:list-item>
              <text:p text:style-name="P323">results – list of result listing objects; a result listing object is a package of results in which data is of the same parameters, in most cases, it will feature one object; each consists of the following fields:</text:p>
              <text:list text:continue-numbering="true">
                <text:list-item>
                  <text:p text:style-name="P324">keys – a listing of result names (and units)</text:p>
                </text:list-item>
                <text:list-item>
                  <text:p text:style-name="P325">data – a list of result data records; each data record consists of the following fields:</text:p>
                  <text:list text:continue-numbering="true">
                    <text:list-item>
                      <text:p text:style-name="P326">timestamp – time of the sample</text:p>
                    </text:list-item>
                    <text:list-item>
                      <text:p text:style-name="P327">values – a list of values for the given timestamp corresponding (in order) to the keys from the<text:s/><text:span text:style-name="T328">keys</text:span><text:s/>field; missing data is denoted by '---' text</text:p>
                    </text:list-item>
                  </text:list>
                </text:list-item>
              </text:list>
            </text:list-item>
            <text:list-item>
              <text:p text:style-name="P329">instrument (optional) – if the result has originated from an instrument supported by Svantek, its details will be provided here; it contains the following fields:</text:p>
              <text:list text:continue-numbering="true">
                <text:list-item>
                  <text:p text:style-name="P330">type – type of the instrument</text:p>
                </text:list-item>
                <text:list-item>
                  <text:p text:style-name="P331">serial – serial number of the instrument</text:p>
                </text:list-item>
              </text:list>
            </text:list-item>
          </text:list>
        </text:list-item>
      </text:list>
      <text:p text:style-name="P332"><text:tab/></text:p>
      <text:p text:style-name="P333"/>
      <text:p text:style-name="P334"/>
      <text:p text:style-name="P335"/>
      <text:p text:style-name="P336"/>
      <text:p text:style-name="P337"><text:tab/></text:p>
      <text:p text:style-name="P338">3.3 Results data – One call for multiple stations</text:p>
      <text:p text:style-name="P339"/>
      <text:p text:style-name="P340"><text:a xlink:href="https://svannet.com/api/v2.3/projects-get-result-data-multi-beta.php" office:target-frame-name="_top" xlink:show="replace">https://svannet.com/api/v2.3/projects-get-result-data-multi-point.php</text:a></text:p>
      <text:p text:style-name="P341"><text:tab/></text:p>
      <text:p text:style-name="P342"><text:tab/>Returns data for multiple stations for provided results list. Highly recommended for projects<text:s/><text:tab/>and users where API will be used for multiple stations to limit the amount of calls.</text:p>
      <text:p text:style-name="P343"/>
      <text:p text:style-name="P344"><text:tab/>Input parameters (required):</text:p>
      <text:list text:style-name="LFO3" text:continue-numbering="true">
        <text:list-item>
          <text:list>
            <text:list-item>
              <text:list>
                <text:list-item>
                  <text:p text:style-name="P345">key (POST) – <text:s/>access token configured with API access token tool by the account owner.</text:p>
                </text:list-item>
                <text:list-item>
                  <text:p text:style-name="P346">project (POST) – project identifier as per listing in request 2</text:p>
                </text:list-item>
                <text:list-item>
                  <text:p text:style-name="P347">data <text:s/>(POST) – JSON array detailing list of point IDs and time_from, time_to. Example below:</text:p>
                </text:list-item>
              </text:list>
            </text:list-item>
          </text:list>
        </text:list-item>
      </text:list>
      <text:p text:style-name="P348">[</text:p>
      <text:p text:style-name="P349"><text:s text:c="4"/>{ "point": 0, "time_from" : "2022-02-03 17:34:00", "time_to" : "2022-02-03 17:45:00" },</text:p>
      <text:p text:style-name="P350"><text:s text:c="4"/>{ "point": 1, "time_from" : "2022-02-03 17:34:00", "time_to" : "2022-02-03 17:45:00" },</text:p>
      <text:p text:style-name="P351"><text:s text:c="4"/>{ "point": 2, "time_from" : "2022-02-03 17:34:00", "time_to" : "2022-02-03 17:45:00" }</text:p>
      <text:p text:style-name="P352">]</text:p>
      <text:p text:style-name="P353"/>
      <text:p text:style-name="P354"><text:tab/>Where:</text:p>
      <text:list text:style-name="LFO13" text:continue-numbering="true">
        <text:list-item>
          <text:list>
            <text:list-item>
              <text:list>
                <text:list-item>
                  <text:list>
                    <text:list-item>
                      <text:p text:style-name="P355">point (POST) – point identifier as per listing in request 2 or 3.1</text:p>
                    </text:list-item>
                    <text:list-item>
                      <text:p text:style-name="P356">time_from (POST) – starting time of time range for which the results data is to be returned</text:p>
                    </text:list-item>
                    <text:list-item>
                      <text:p text:style-name="P357">time_to (POST) – end time of time range for which the results data is to be returned</text:p>
                    </text:list-item>
                  </text:list>
                </text:list-item>
              </text:list>
            </text:list-item>
          </text:list>
        </text:list-item>
      </text:list>
      <text:p text:style-name="P358"/>
      <text:list text:style-name="LFO13" text:continue-numbering="true">
        <text:list-item>
          <text:list>
            <text:list-item>
              <text:list>
                <text:list-item>
                  <text:p text:style-name="P359">results – a list of key_code 's indicating the desired selection of results (at least 1). Example below:<text:line-break/></text:p>
                </text:list-item>
              </text:list>
            </text:list-item>
          </text:list>
        </text:list-item>
      </text:list>
      <text:p text:style-name="P360">[</text:p>
      <text:p text:style-name="P361"><text:s text:c="4"/>"leq-S-T-0-0-N",</text:p>
      <text:p text:style-name="P362"><text:s text:c="4"/>"lr1-S-T-0-0-N",</text:p>
      <text:p text:style-name="P363"><text:s text:c="4"/>"leq-S-T-0-1-N",</text:p>
      <text:p text:style-name="P364"><text:s text:c="4"/>"lr1-S-T-0-1-N",</text:p>
      <text:p text:style-name="P365"><text:s text:c="4"/>"meteo_temp-T",</text:p>
      <text:p text:style-name="P366"><text:s text:c="4"/>"meteo_wind_speed_avg-T",</text:p>
      <text:p text:style-name="P367"><text:s text:c="4"/>"meteo_wind_direct-T",</text:p>
      <text:p text:style-name="P368"><text:s text:c="4"/>"meteo_rain-S"</text:p>
      <text:p text:style-name="P369">]</text:p>
      <text:p text:style-name="P370"/>
      <text:p text:style-name="P371"/>
      <text:p text:style-name="P372"/>
      <text:p text:style-name="P373"><text:tab/>Note: Much like in point 3.2, the key_codes used for this call follow the convention regarding fetching of aggregated data. Each key_code inputted in the call may use or not use aggregation.</text:p>
      <text:p text:style-name="P374"/>
      <text:p text:style-name="P375"/>
      <text:p text:style-name="P376">Output information (JSON):</text:p>
      <text:list text:style-name="LFO3" text:continue-numbering="true">
        <text:list-item>
          <text:list>
            <text:list-item>
              <text:list>
                <text:list-item>
                  <text:p text:style-name="P377">status – status of the processed request (text):</text:p>
                </text:list-item>
                <text:list-item>
                  <text:p text:style-name="P378">ok – status processed correctly</text:p>
                </text:list-item>
                <text:list-item>
                  <text:p text:style-name="P379">invalid parameters – incorrect parameters (missing required) or results has zero<text:s/><text:soft-page-break/>components</text:p>
                </text:list-item>
                <text:list-item>
                  <text:p text:style-name="P380">no auth – incorrect authorization token</text:p>
                </text:list-item>
                <text:list-item>
                  <text:p text:style-name="P381">query count exceeded daily limit – exceeded the amount of daily query allowance (default: 1500) for all keys associated with premium account</text:p>
                </text:list-item>
                <text:list-item>
                  <text:p text:style-name="P382">any other value – temporary system error, attempting the request at later time may be successful</text:p>
                </text:list-item>
              </text:list>
            </text:list-item>
            <text:list-item>
              <text:p text:style-name="P383">results – list of result listing objects; a result listing object is a package of results in which data is of the same parameters, in most cases, it will feature one object; each consists of the following fields:</text:p>
              <text:list text:continue-numbering="true">
                <text:list-item>
                  <text:p text:style-name="P384">keys – a listing of result names (with units) and corresponding<text:s/><text:span text:style-name="T385">key_codes</text:span></text:p>
                </text:list-item>
                <text:list-item>
                  <text:p text:style-name="P386">data – a list of result data records; each data record consists of the following fields:</text:p>
                  <text:list text:continue-numbering="true">
                    <text:list-item>
                      <text:p text:style-name="P387">timestamp – time of the sample</text:p>
                    </text:list-item>
                    <text:list-item>
                      <text:p text:style-name="P388">values – a list of values for the given timestamp corresponding (in order) to the keys from the<text:s/><text:span text:style-name="T389">keys</text:span><text:s/>field; missing data is denoted by '---' text</text:p>
                    </text:list-item>
                  </text:list>
                </text:list-item>
              </text:list>
            </text:list-item>
            <text:list-item>
              <text:p text:style-name="P390">instrument (optional) – if the result has originated from an instrument supported by Svantek, its details will be provided here; it contains the following fields:</text:p>
              <text:list text:continue-numbering="true">
                <text:list-item>
                  <text:p text:style-name="P391">type – type of the instrument</text:p>
                </text:list-item>
                <text:list-item>
                  <text:p text:style-name="P392">serial – serial number of the instrument</text:p>
                </text:list-item>
              </text:list>
            </text:list-item>
          </text:list>
        </text:list-item>
      </text:list>
      <text:p text:style-name="P3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ichał Bartkowicz</meta:initial-creator>
    <dc:creator>haakan eriksson</dc:creator>
    <meta:creation-date>2024-09-16T08:38:00Z</meta:creation-date>
    <dc:date>2024-09-16T08:38:00Z</dc:date>
    <meta:template xlink:href="Normal.dotm" xlink:type="simple"/>
    <meta:editing-cycles>2</meta:editing-cycles>
    <meta:editing-duration>PT60S</meta:editing-duration>
    <meta:document-statistic meta:page-count="11" meta:paragraph-count="54" meta:word-count="4055" meta:character-count="27115" meta:row-count="192" meta:non-whitespace-character-count="23114"/>
  </office:meta>
</office:document-meta>
</file>